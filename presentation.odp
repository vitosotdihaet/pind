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600000198A09B8021.png" manifest:media-type="image/png"/>
  <manifest:file-entry manifest:full-path="Pictures/10000001000002BD000002BABBE7205A.png" manifest:media-type="image/png"/>
  <manifest:file-entry manifest:full-path="Pictures/10000001000001A1000000C0911E141B.png" manifest:media-type="image/png"/>
  <manifest:file-entry manifest:full-path="Pictures/100000010000018F000000BC368AAC44.png" manifest:media-type="image/png"/>
  <manifest:file-entry manifest:full-path="Pictures/1000000000000379000001EA0DEAE6BB.png" manifest:media-type="image/png"/>
  <manifest:file-entry manifest:full-path="Pictures/1000000000000379000001EAB7A98B09.png" manifest:media-type="image/png"/>
  <manifest:file-entry manifest:full-path="Pictures/10000001000001A3000000BB005E66A8.png" manifest:media-type="image/png"/>
  <manifest:file-entry manifest:full-path="Pictures/100000010000050E000000BD61010406.png" manifest:media-type="image/png"/>
  <manifest:file-entry manifest:full-path="Pictures/100000010000029A000000B69B10E1CC.png" manifest:media-type="image/png"/>
  <manifest:file-entry manifest:full-path="Pictures/1001F26A000041BC00001E2EFD96B4E3.pdf" manifest:media-type="application/pdf"/>
  <manifest:file-entry manifest:full-path="Pictures/10000001000002E4000001B0EE0BE758.png" manifest:media-type="image/png"/>
  <manifest:file-entry manifest:full-path="Pictures/1000000100000500000005009E8D18F3.png" manifest:media-type="image/png"/>
  <manifest:file-entry manifest:full-path="Pictures/100000010000028C000001247F0DA8A3.png" manifest:media-type="image/png"/>
  <manifest:file-entry manifest:full-path="Pictures/10000000000002580000025828CED5F2.png" manifest:media-type="image/png"/>
  <manifest:file-entry manifest:full-path="Pictures/10013F3000002AE400001F02629A1ABD.pdf" manifest:media-type="application/pdf"/>
  <manifest:file-entry manifest:full-path="Pictures/100000010000027C000001248290F1FA.png" manifest:media-type="image/png"/>
  <manifest:file-entry manifest:full-path="Pictures/100000010000031C000000920F1559BB.png" manifest:media-type="image/png"/>
  <manifest:file-entry manifest:full-path="Pictures/1001DF010000436300001E2E802DD485.pdf" manifest:media-type="application/pdf"/>
  <manifest:file-entry manifest:full-path="Pictures/1000000000000379000001EA6DF73825.png" manifest:media-type="image/png"/>
  <manifest:file-entry manifest:full-path="Pictures/100000010000019D000000BB5FE70595.png" manifest:media-type="image/png"/>
  <manifest:file-entry manifest:full-path="Pictures/100000010000019F0000012CBECBB9C8.png" manifest:media-type="image/png"/>
  <manifest:file-entry manifest:full-path="Pictures/1001CB7F000044A000002BD20CB3F173.pdf" manifest:media-type="application/pdf"/>
  <manifest:file-entry manifest:full-path="Pictures/1001D4FD00004C7B00002CA6D8F49111.pdf" manifest:media-type="application/pdf"/>
  <manifest:file-entry manifest:full-path="Pictures/10000000000003620000028AAF43F2CB.jpg" manifest:media-type="image/jpeg"/>
  <manifest:file-entry manifest:full-path="Pictures/10000001000001AD000000B3D5D08F3D.png" manifest:media-type="image/png"/>
  <manifest:file-entry manifest:full-path="Pictures/10000000000004B0000002D0E860049D.png" manifest:media-type="image/png"/>
  <manifest:file-entry manifest:full-path="Pictures/10000001000004B000000436C2E9BAD7.png" manifest:media-type="image/png"/>
  <manifest:file-entry manifest:full-path="Pictures/1000000100000298000001A8F6148938.png" manifest:media-type="image/png"/>
  <manifest:file-entry manifest:full-path="Pictures/1001BEE000003E8700002DE419A025EF.pdf" manifest:media-type="application/pdf"/>
  <manifest:file-entry manifest:full-path="Pictures/10000001000001AA000000D78E8F3CE7.png" manifest:media-type="image/png"/>
  <manifest:file-entry manifest:full-path="Pictures/100000010000025D000001BC0A3D64AE.png" manifest:media-type="image/png"/>
  <manifest:file-entry manifest:full-path="Pictures/10000000000004B0000002D0946A218E.png" manifest:media-type="image/png"/>
  <manifest:file-entry manifest:full-path="Pictures/1000000100000323000000E6AC7E3D99.png" manifest:media-type="image/png"/>
  <manifest:file-entry manifest:full-path="Pictures/1000000000000379000001EA277BB3BF.png" manifest:media-type="image/png"/>
  <manifest:file-entry manifest:full-path="Pictures/10000001000001AF000000BCC923A9D4.png" manifest:media-type="image/png"/>
  <manifest:file-entry manifest:full-path="Pictures/1000000000000379000001EABE1F2E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4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60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53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999999" loext:opacity="100%" style:font-name="CaskaydiaMono NF SemiLigh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askaydiaMono NF SemiLight" fo:font-size="20pt" style:font-size-asian="20pt" style:font-size-complex="20pt" fo:hyphenate="false" loext:hyphenation-no-caps="false" loext:hyphenation-no-last-word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center"/>
      <style:text-properties style:font-name="CaskaydiaMono NF SemiLight1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9" style:family="paragraph">
      <loext:graphic-properties draw:fill="none"/>
      <style:paragraph-properties fo:margin-top="0.42cm" fo:margin-bottom="0.35cm"/>
      <style:text-properties style:font-name="CaskaydiaMono NF SemiLight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1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60pt" fo:letter-spacing="normal" fo:language="ru" fo:country="RU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18.6000003814697pt" fo:letter-spacing="normal" fo:language="ru" fo:country="RU" fo:font-style="normal" style:text-underline-style="none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999999" loext:opacity="100%" style:font-name="CaskaydiaMono NF SemiLight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askaydiaMono NF SemiLight" fo:font-size="20pt" style:font-size-asian="20pt" style:font-size-complex="20pt"/>
    </style:style>
    <style:style style:name="T7" style:family="text">
      <style:text-properties style:font-name="CaskaydiaMono NF SemiLight"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36pt" fo:letter-spacing="normal" fo:language="ru" fo:country="RU" fo:font-style="normal" style:text-underline-style="none" fo:font-weight="bold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office:forms form:automatic-focus="false" form:apply-design-mode="false"/>
        <draw:frame draw:name="Google Shape;95;p2" presentation:style-name="pr1" draw:text-style-name="P2" draw:layer="layout" svg:width="25.399cm" svg:height="6.631cm" svg:x="4.234cm" svg:y="6.069cm" presentation:class="title" presentation:user-transformed="true">
          <draw:text-box>
            <text:p text:style-name="P1"><text:span text:style-name="T1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2" draw:text-style-name="P5" draw:layer="layout" svg:width="25.399cm" svg:height="1.905cm" svg:x="0.635cm" svg:y="16.51cm" presentation:class="subtitle" presentation:user-transformed="true">
          <draw:text-box>
            <text:p text:style-name="P3"><text:span text:style-name="T2">Выполнил: Клименко В.М. М8О-403Б-22</text:span></text:p>
            <text:p text:style-name="P4"><text:span text:style-name="T2">Научный руководитель: канд. техн. наук, доц. Романенков А.М.</text:span></text:p>
          </draw:text-box>
        </draw:frame>
        <draw:frame draw:style-name="gr1" draw:text-style-name="P7" draw:layer="layout" svg:width="25.4cm" svg:height="1.979cm" svg:x="4.233cm" svg:y="12.18cm">
          <draw:text-box>
            <text:p text:style-name="P6"><text:span text:style-name="T3">Московский авиационный институт</text:span></text:p>
            <text:p text:style-name="P6"><text:span text:style-name="T3">(национальный исследовательский университет)</text:span></text:p>
          </draw:text-box>
        </draw:frame>
        <presentation:notes draw:style-name="dp2">
          <draw:page-thumbnail draw:name="Google Shape;91;p2:notes" draw:style-name="gr2" draw:layer="layout" svg:width="15.239cm" svg:height="8.572cm" svg:x="1.905cm" svg:y="3.175cm" draw:page-number="1" presentation:class="page"/>
          <draw:frame draw:name="Google Shape;9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01;p 1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едметная область</text:span></text:p>
          </draw:text-box>
        </draw:frame>
        <draw:frame draw:name="Google Shape;102;p 1" presentation:style-name="pr6" draw:text-style-name="P14" draw:layer="layout" svg:width="14.817cm" svg:height="12.086cm" svg:x="2.328cm" svg:y="5.071cm" presentation:class="outline" presentation:user-transformed="true">
          <draw:text-box>
            <text:p text:style-name="P13"><text:span text:style-name="T6">Объект работы: индексирование данных в распределенных СУБД</text:span></text:p>
            <text:p text:style-name="P13"><text:span text:style-name="T6">Предмет работы: глобальный вторичный индекс в распределенной СУБД Picodata</text:span></text:p>
          </draw:text-box>
        </draw:frame>
        <presentation:notes draw:style-name="dp3">
          <draw:frame draw:name="Google Shape;98;p3:notes 1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01;p 7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облема</text:span></text:p>
          </draw:text-box>
        </draw:frame>
        <draw:frame draw:name="Google Shape;102;p 14" presentation:style-name="pr8" draw:text-style-name="P14" draw:layer="layout" svg:width="12.912cm" svg:height="12.086cm" svg:x="2.328cm" svg:y="5.071cm" presentation:class="outline" presentation:user-transformed="true">
          <draw:text-box>
            <text:p text:style-name="P13"><text:span text:style-name="T6">Неэффективный поиск по вторичным ключам высокой кардинальности ввиду стратегии сегментирования индекса в кластере СУБД Picodata.</text:span></text:p>
            <text:p text:style-name="P13"><text:span text:style-name="T6">Каждый запрос опрашивает весь кластер, что приводит к блокировке исполнения заявок других клиентов на время поиска.</text:span></text:p>
          </draw:text-box>
        </draw:frame>
        <presentation:notes draw:style-name="dp3">
          <draw:frame draw:name="Google Shape;98;p3:notes 7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7" draw:style-name="gr2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2T11">
        <office:forms form:automatic-focus="false" form:apply-design-mode="false"/>
        <draw:frame draw:name="Google Shape;101;p 8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Функ. Схема БД</text:span></text:p>
          </draw:text-box>
        </draw:frame>
        <draw:frame draw:style-name="gr3" draw:text-style-name="P15" draw:layer="layout" svg:width="17.981cm" svg:height="8.255cm" svg:x="15.24cm" svg:y="6.985cm">
          <draw:image xlink:href="Pictures/1001F26A000041BC00001E2EFD96B4E3.pdf" xlink:type="simple" xlink:show="embed" xlink:actuate="onLoad" draw:mime-type="application/pdf" loext:page-number="0">
            <text:p/>
          </draw:image>
          <draw:image xlink:href="Pictures/100000010000027C000001248290F1FA.png" xlink:type="simple" xlink:show="embed" xlink:actuate="onLoad" draw:mime-type="image/png"/>
        </draw:frame>
        <draw:frame draw:style-name="gr3" draw:text-style-name="P15" draw:layer="layout" svg:width="11.614cm" svg:height="8.396cm" svg:x="1.905cm" svg:y="5.08cm">
          <draw:image xlink:href="Pictures/10013F3000002AE400001F02629A1ABD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1">
          <office:forms form:automatic-focus="false" form:apply-design-mode="false"/>
          <draw:frame draw:name="Google Shape;98;p3:notes 8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8" draw:style-name="gr2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2T11">
        <office:forms form:automatic-focus="false" form:apply-design-mode="false"/>
        <draw:frame draw:name="Google Shape;101;p 2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Актуальность</text:span></text:p>
          </draw:text-box>
        </draw:frame>
        <draw:frame draw:name="Google Shape;102;p 2" presentation:style-name="pr11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Распределение нагрузки на несколько </text:span><text:span text:style-name="T7">серверов – необходимость в случае крупных </text:span><text:span text:style-name="T7">цифровых продуктов.</text:span></text:p>
            <text:p text:style-name="P16"><text:span text:style-name="T7">Вторичные индексы – это важнейший </text:span><text:span text:style-name="T7">инструмент по обеспечению быстрого поиска </text:span><text:span text:style-name="T7">в СУБД.</text:span></text:p>
            <text:p text:style-name="P16"><text:span text:style-name="T8">При поиске в локальном вторичном индексе </text:span><text:span text:style-name="T8">(ЛВИ), количество сетевых запросов растет </text:span><text:span text:style-name="T8">линейно количеству узлов в кластере. </text:span><text:span text:style-name="T8">Также растет </text:span><text:span text:style-name="T7">общее потребление ЦПУ.</text:span></text:p>
          </draw:text-box>
        </draw:frame>
        <presentation:notes draw:style-name="dp3">
          <draw:frame draw:name="Google Shape;98;p3:notes 2" presentation:style-name="pr1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2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2T11">
        <office:forms form:automatic-focus="false" form:apply-design-mode="false"/>
        <draw:frame draw:name="Google Shape;101;p 3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Решение</text:span></text:p>
          </draw:text-box>
        </draw:frame>
        <draw:frame draw:name="Google Shape;102;p 3" presentation:style-name="pr13" draw:text-style-name="P14" draw:layer="layout" svg:width="30.692cm" svg:height="6.359cm" svg:x="2.328cm" svg:y="5.071cm" presentation:class="outline" presentation:user-transformed="true">
          <draw:text-box>
            <text:p text:style-name="P16"><text:span text:style-name="T7">Глобальный вторичный индекс (ГВИ) - индексная структура с сегментацией данных, отличной от сегментации индексируемой таблицы.</text:span></text:p>
            <text:p text:style-name="P16"><text:span text:style-name="T7">Такая структура позволяет максимально повышать эффективность поиска по вторичным ключам высокой кардинальности. В иных случаях он практически не уступает ЛВИ.</text:span></text:p>
            <text:p text:style-name="P16"><text:span text:style-name="T7">Недостаток: обновление записи происходит с двумя дополнительными сетевыми запросами.</text:span></text:p>
          </draw:text-box>
        </draw:frame>
        <draw:frame draw:style-name="gr3" draw:text-style-name="P15" draw:layer="layout" svg:width="18.433cm" svg:height="8.255cm" svg:x="7.62cm" svg:y="10.495cm">
          <draw:image xlink:href="Pictures/1001DF010000436300001E2E802DD485.pdf" xlink:type="simple" xlink:show="embed" xlink:actuate="onLoad" draw:mime-type="application/pdf" loext:page-number="0">
            <text:p/>
          </draw:image>
          <draw:image xlink:href="Pictures/100000010000028C000001247F0DA8A3.png" xlink:type="simple" xlink:show="embed" xlink:actuate="onLoad" draw:mime-type="image/png"/>
        </draw:frame>
        <presentation:notes draw:style-name="dp3">
          <draw:frame draw:name="Google Shape;98;p3:notes 3" presentation:style-name="pr1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2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2T11">
        <office:forms form:automatic-focus="false" form:apply-design-mode="false"/>
        <draw:frame draw:name="Google Shape;101;p 4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Цель</text:span></text:p>
          </draw:text-box>
        </draw:frame>
        <draw:frame draw:name="Google Shape;102;p 4" presentation:style-name="pr15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Дать заказчикам возможность выбора индексной структуры, подходящей под их нужды.</text:span></text:p>
            <text:p text:style-name="P16"><text:span text:style-name="T7">Выбор зависит от множества параметров:</text:span></text:p>
            <text:p text:style-name="P16"><text:span text:style-name="T7">- размер кластера,</text:span></text:p>
            <text:p text:style-name="P16"><text:span text:style-name="T7">- нагрузка на кластер, ее вид,</text:span></text:p>
            <text:p text:style-name="P16"><text:span text:style-name="T7">- скорость сети между узлами,</text:span></text:p>
            <text:p text:style-name="P16"><text:span text:style-name="T7">- ...</text:span></text:p>
            <text:p text:style-name="P16"><text:span text:style-name="T7">Необходимо создать способ расчета эффективности индексов по этим параметрам. </text:span></text:p>
          </draw:text-box>
        </draw:frame>
        <presentation:notes draw:style-name="dp3">
          <draw:frame draw:name="Google Shape;98;p3:notes 4" presentation:style-name="pr1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2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2T11">
        <office:forms form:automatic-focus="false" form:apply-design-mode="false"/>
        <draw:frame draw:name="Google Shape;101;p 5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Задачи</text:span></text:p>
          </draw:text-box>
        </draw:frame>
        <draw:frame draw:name="Google Shape;102;p 5" presentation:style-name="pr17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1. Составить математическую модель обеих индексных структур.</text:span></text:p>
            <text:p text:style-name="P16"><text:span text:style-name="T7">2. Разработать плагин ГВИ для СУБД Picodata.</text:span></text:p>
            <text:p text:style-name="P16"><text:span text:style-name="T7">3. Проверить точность математической модели с помощью множества натурных экспериментов малого масштаба.</text:span></text:p>
            <text:p text:style-name="P16"><text:span text:style-name="T7">4. С помощью модели найти параметры, при которых каждая индексная структура показывает себя лучше другой и составить справочные материалы по их использованию.</text:span></text:p>
          </draw:text-box>
        </draw:frame>
        <presentation:notes draw:style-name="dp3">
          <draw:frame draw:name="Google Shape;98;p3:notes 5" presentation:style-name="pr1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2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2T11">
        <office:forms form:automatic-focus="false" form:apply-design-mode="false"/>
        <draw:frame draw:style-name="gr3" draw:text-style-name="P15" draw:layer="layout" svg:width="5.08cm" svg:height="5.08cm" svg:x="19.05cm" svg:y="10.16cm">
          <draw:image xlink:href="Pictures/10000000000002580000025828CED5F2.png" xlink:type="simple" xlink:show="embed" xlink:actuate="onLoad" draw:mime-type="image/png">
            <text:p/>
          </draw:image>
        </draw:frame>
        <draw:frame draw:name="Google Shape;101;p 6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Сравнение с аналогами</text:span></text:p>
          </draw:text-box>
        </draw:frame>
        <draw:frame draw:name="Google Shape;102;p 6" presentation:style-name="pr19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Глобальный вторичный индекс – не новая идея, например, она реализована в следующих СУБД: DynamoDB, Couchbase, ScyllaDB, ...</text:span></text:p>
            <text:p text:style-name="P16"><text:span text:style-name="T7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draw:frame draw:style-name="gr3" draw:text-style-name="P15" draw:layer="layout" svg:width="8.46cm" svg:height="6.35cm" svg:x="18.615cm" svg:y="3.81cm">
          <draw:image xlink:href="Pictures/10000000000003620000028AAF43F2CB.jpg" xlink:type="simple" xlink:show="embed" xlink:actuate="onLoad" draw:mime-type="image/jpeg">
            <text:p/>
          </draw:image>
        </draw:frame>
        <draw:frame draw:style-name="gr3" draw:text-style-name="P15" draw:layer="layout" svg:width="4.732cm" svg:height="4.732cm" svg:x="26.035cm" svg:y="7.033cm">
          <draw:image xlink:href="Pictures/1000000100000500000005009E8D18F3.png" xlink:type="simple" xlink:show="embed" xlink:actuate="onLoad" draw:mime-type="image/png">
            <text:p/>
          </draw:image>
        </draw:frame>
        <draw:frame draw:style-name="gr3" draw:text-style-name="P15" draw:layer="layout" svg:width="5.519cm" svg:height="4.958cm" svg:x="24.23cm" svg:y="12.287cm">
          <draw:image xlink:href="Pictures/10000001000004B000000436C2E9BAD7.png" xlink:type="simple" xlink:show="embed" xlink:actuate="onLoad" draw:mime-type="image/png">
            <text:p/>
          </draw:image>
        </draw:frame>
        <presentation:notes draw:style-name="dp3">
          <draw:frame draw:name="Google Shape;98;p3:notes 6" presentation:style-name="pr2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2" draw:layer="layout" svg:width="15.239cm" svg:height="8.572cm" svg:x="1.905cm" svg:y="3.175cm" draw:page-number="9" presentation:class="page"/>
        </presentation:notes>
      </draw:page>
      <draw:page draw:name="Дизайн исследования" draw:style-name="dp1" draw:master-page-name="OBJECT" presentation:presentation-page-layout-name="AL2T11">
        <office:forms form:automatic-focus="false" form:apply-design-mode="false"/>
        <draw:frame draw:name="Google Shape;107;p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name="Google Shape;102;p 7" presentation:style-name="pr21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СУБД моделируется как N СМО M/G/1, где N - количество наборов реплик в кластере.</text:span></text:p>
            <text:p text:style-name="P16"><text:span text:style-name="T7">В модели учитывается время работы узла и передача результатов по сети.</text:span></text:p>
            <text:p text:style-name="P16"><text:span text:style-name="T7">Предполагается равномерное распределение данных в кластере.</text:span></text:p>
            <text:p text:style-name="P16"><text:span text:style-name="T7"/></text:p>
          </draw:text-box>
        </draw:frame>
        <draw:frame draw:style-name="gr3" draw:text-style-name="P15" draw:layer="layout" svg:width="10.786cm" svg:height="1.575cm" svg:x="20.229cm" svg:y="4.575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3" draw:text-style-name="P15" draw:layer="layout" svg:width="11.43cm" svg:height="3.273cm" svg:x="19.785cm" svg:y="11.095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3" draw:text-style-name="P15" draw:layer="layout" svg:width="10.282cm" svg:height="2.809cm" svg:x="20.42cm" svg:y="7.18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3" draw:text-style-name="P15" draw:layer="layout" svg:width="9.055cm" svg:height="1.66cm" svg:x="20.925cm" svg:y="15.54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2">
          <draw:frame draw:name="Google Shape;104;p4:notes" presentation:style-name="pr2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2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2T11">
        <office:forms form:automatic-focus="false" form:apply-design-mode="false"/>
        <draw:frame draw:name="Google Shape;107;p 10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style-name="gr3" draw:text-style-name="P15" draw:layer="layout" svg:width="10.786cm" svg:height="1.575cm" svg:x="20.229cm" svg:y="4.575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3" draw:text-style-name="P15" draw:layer="layout" svg:width="11.43cm" svg:height="3.273cm" svg:x="19.785cm" svg:y="11.095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3" draw:text-style-name="P15" draw:layer="layout" svg:width="10.282cm" svg:height="2.809cm" svg:x="20.42cm" svg:y="7.18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3" draw:text-style-name="P15" draw:layer="layout" svg:width="9.055cm" svg:height="1.66cm" svg:x="20.925cm" svg:y="15.54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Google Shape;104;p4:notes 10" presentation:style-name="pr2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0" draw:style-name="gr2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2T11">
        <office:forms form:automatic-focus="false" form:apply-design-mode="false"/>
        <draw:frame draw:name="Google Shape;107;p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араметры модели</text:span></text:p>
          </draw:text-box>
        </draw:frame>
        <draw:frame draw:name="Google Shape;102;p 11" presentation:style-name="pr24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Пользователям модели предлагается самим рассчитать показатели, актуальные для их сервиса и кластера СУБД.</text:span></text:p>
            <text:p text:style-name="P16"><text:span text:style-name="T7">Предоставлены ориентировочные значения каждого параметра для удобства моделирования.</text:span></text:p>
          </draw:text-box>
        </draw:frame>
        <presentation:notes draw:style-name="dp3">
          <draw:frame draw:name="Google Shape;104;p4:notes 3" presentation:style-name="pr2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2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2T11">
        <office:forms form:automatic-focus="false" form:apply-design-mode="false"/>
        <draw:frame draw:name="Google Shape;107;p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оказатели эффективности</text:span></text:p>
          </draw:text-box>
        </draw:frame>
        <draw:frame draw:name="Google Shape;102;p 8" presentation:style-name="pr26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В качестве результата, модель возвращает значения четырех показателей эффективности:</text:span></text:p>
            <text:p text:style-name="P16"><text:span text:style-name="T7">- максимальная нагрузка на кластер</text:span></text:p>
            <text:p text:style-name="P16"><text:span text:style-name="T7">- вероятность необслуживания запроса ввиду таймаута</text:span></text:p>
            <text:p text:style-name="P16"><text:span text:style-name="T8">- среднее время ожидания </text:span><text:span text:style-name="T7">пользователем ответа от СУБД</text:span></text:p>
            <text:p text:style-name="P16"><text:span text:style-name="T7">- среднее время нахождения заявки в очереди</text:span></text:p>
          </draw:text-box>
        </draw:frame>
        <draw:frame draw:style-name="gr3" draw:text-style-name="P15" draw:layer="layout" svg:width="13.792cm" svg:height="7.602cm" svg:x="19.05cm" svg:y="4.463cm">
          <draw:image xlink:href="Pictures/1000000000000379000001EA6DF73825.png" xlink:type="simple" xlink:show="embed" xlink:actuate="onLoad" draw:mime-type="image/png">
            <text:p/>
          </draw:image>
        </draw:frame>
        <draw:frame draw:style-name="gr3" draw:text-style-name="P15" draw:layer="layout" svg:width="9.05cm" svg:height="4.098cm" svg:x="21.59cm" svg:y="13.335cm">
          <draw:image xlink:href="Pictures/100000010000019D000000BB5FE70595.png" xlink:type="simple" xlink:show="embed" xlink:actuate="onLoad" draw:mime-type="image/png">
            <text:p/>
          </draw:image>
        </draw:frame>
        <presentation:notes draw:style-name="dp3">
          <draw:frame draw:name="Google Shape;104;p4:notes 1" presentation:style-name="pr2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2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2T11">
        <office:forms form:automatic-focus="false" form:apply-design-mode="false"/>
        <draw:frame draw:name="Google Shape;107;p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Глобальный вторичный индекс</text:span></text:p>
          </draw:text-box>
        </draw:frame>
        <draw:frame draw:style-name="gr3" draw:text-style-name="P15" draw:layer="layout" svg:width="18.415cm" svg:height="10.75cm" svg:x="7.62cm" svg:y="3.855cm">
          <draw:image xlink:href="Pictures/1001D4FD00004C7B00002CA6D8F49111.pdf" xlink:type="simple" xlink:show="embed" xlink:actuate="onLoad" draw:mime-type="application/pdf" loext:page-number="0">
            <text:p/>
          </draw:image>
          <draw:image xlink:href="Pictures/10000001000002E4000001B0EE0BE758.png" xlink:type="simple" xlink:show="embed" xlink:actuate="onLoad" draw:mime-type="image/png"/>
        </draw:frame>
        <presentation:notes draw:style-name="dp3">
          <draw:frame draw:name="Google Shape;104;p4:notes 4" presentation:style-name="pr2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2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2T11">
        <office:forms form:automatic-focus="false" form:apply-design-mode="false"/>
        <draw:frame draw:name="Google Shape;107;p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Особенности ГВИ</text:span></text:p>
          </draw:text-box>
        </draw:frame>
        <draw:frame draw:style-name="gr4" draw:text-style-name="P17" draw:layer="layout" svg:width="16.906cm" svg:height="10.795cm" svg:x="0.635cm" svg:y="5.08cm">
          <draw:image xlink:href="Pictures/1001CB7F000044A000002BD20CB3F173.pdf" xlink:type="simple" xlink:show="embed" xlink:actuate="onLoad" draw:mime-type="application/pdf" loext:page-number="0">
            <text:p/>
          </draw:image>
          <draw:image xlink:href="Pictures/1000000100000298000001A8F6148938.png" xlink:type="simple" xlink:show="embed" xlink:actuate="onLoad" draw:mime-type="image/png"/>
        </draw:frame>
        <presentation:notes draw:style-name="dp3">
          <draw:frame draw:name="Google Shape;104;p4:notes 5" presentation:style-name="pr2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5" draw:style-name="gr2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2T11">
        <office:forms form:automatic-focus="false" form:apply-design-mode="false"/>
        <draw:frame draw:name="Google Shape;107;p 1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Особенности ГВИ</text:span></text:p>
          </draw:text-box>
        </draw:frame>
        <draw:frame draw:style-name="gr3" draw:text-style-name="P15" draw:layer="layout" svg:width="14.98cm" svg:height="10.995cm" svg:x="18.04cm" svg:y="5.08cm">
          <draw:image xlink:href="Pictures/1001BEE000003E8700002DE419A025EF.pdf" xlink:type="simple" xlink:show="embed" xlink:actuate="onLoad" draw:mime-type="application/pdf" loext:page-number="0">
            <text:p/>
          </draw:image>
          <draw:image xlink:href="Pictures/100000010000025D000001BC0A3D64AE.png" xlink:type="simple" xlink:show="embed" xlink:actuate="onLoad" draw:mime-type="image/png"/>
        </draw:frame>
        <presentation:notes draw:style-name="dp1">
          <office:forms form:automatic-focus="false" form:apply-design-mode="false"/>
          <draw:frame draw:name="Google Shape;104;p4:notes 11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1" draw:style-name="gr2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2T11">
        <office:forms form:automatic-focus="false" form:apply-design-mode="false"/>
        <draw:frame draw:name="Google Shape;107;p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name="Google Shape;102;p 9" presentation:style-name="pr31" draw:text-style-name="P14" draw:layer="layout" svg:width="25.611cm" svg:height="8.264cm" svg:x="2.329cm" svg:y="5.071cm" presentation:class="outline" presentation:user-transformed="true">
          <draw:text-box>
            <text:p text:style-name="P16"><text:span text:style-name="T7">Были проведены эксперименты на кластерах со следующими параметрами:</text:span></text:p>
            <text:p text:style-name="P16"><text:span text:style-name="T7">- наборов реплик: 1, 4, 8, 16</text:span></text:p>
            <text:p text:style-name="P16"><text:span text:style-name="T7">- кардинальность данных: 125k, 1m, 10m,</text:span></text:p>
            <text:p text:style-name="P16"><text:span text:style-name="T7">- кардинальность вторичных ключей: 1:1, 10:1, 1000:1,</text:span></text:p>
            <text:p text:style-name="P16"><text:span text:style-name="T7">- среднее время задержки между узлами: 10мс.</text:span></text:p>
          </draw:text-box>
        </draw:frame>
        <presentation:notes draw:style-name="dp3">
          <draw:frame draw:name="Google Shape;104;p4:notes 2" presentation:style-name="pr3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2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2T11">
        <office:forms form:automatic-focus="false" form:apply-design-mode="false"/>
        <draw:frame draw:name="Google Shape;107;p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5.054cm" svg:height="9.032cm" svg:x="17.331cm" svg:y="4.303cm">
          <draw:image xlink:href="Pictures/10000000000004B0000002D0946A218E.png" xlink:type="simple" xlink:show="embed" xlink:actuate="onLoad" draw:mime-type="image/png">
            <text:p/>
          </draw:image>
        </draw:frame>
        <draw:frame draw:style-name="gr3" draw:text-style-name="P15" draw:layer="layout" svg:width="10.633cm" svg:height="5.366cm" svg:x="19.685cm" svg:y="13.335cm">
          <draw:image xlink:href="Pictures/10000001000001AA000000D78E8F3CE7.png" xlink:type="simple" xlink:show="embed" xlink:actuate="onLoad" draw:mime-type="image/png">
            <text:p/>
          </draw:image>
        </draw:frame>
        <draw:frame draw:style-name="gr3" draw:text-style-name="P15" draw:layer="layout" svg:width="15.9cm" svg:height="8.764cm" svg:x="0.635cm" svg:y="4.795cm">
          <draw:image xlink:href="Pictures/1000000000000379000001EA277BB3BF.png" xlink:type="simple" xlink:show="embed" xlink:actuate="onLoad" draw:mime-type="image/png">
            <text:p/>
          </draw:image>
        </draw:frame>
        <draw:frame draw:style-name="gr3" draw:text-style-name="P15" draw:layer="layout" svg:width="10.795cm" svg:height="4.708cm" svg:x="3.175cm" svg:y="13.97cm">
          <draw:image xlink:href="Pictures/10000001000001AF000000BCC923A9D4.png" xlink:type="simple" xlink:show="embed" xlink:actuate="onLoad" draw:mime-type="image/png">
            <text:p/>
          </draw:image>
        </draw:frame>
        <presentation:notes draw:style-name="dp3">
          <draw:frame draw:name="Google Shape;104;p4:notes 7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7" draw:style-name="gr2" draw:layer="layout" svg:width="15.239cm" svg:height="8.572cm" svg:x="1.905cm" svg:y="3.175cm" draw:page-number="18" presentation:class="page"/>
        </presentation:notes>
      </draw:page>
      <draw:page draw:name="page19" draw:style-name="dp1" draw:master-page-name="OBJECT" presentation:presentation-page-layout-name="AL2T11">
        <office:forms form:automatic-focus="false" form:apply-design-mode="false"/>
        <draw:frame draw:style-name="gr3" draw:text-style-name="P15" draw:layer="layout" svg:width="15.266cm" svg:height="9.159cm" svg:x="17.119cm" svg:y="4.445cm">
          <draw:image xlink:href="Pictures/10000000000004B0000002D0E860049D.png" xlink:type="simple" xlink:show="embed" xlink:actuate="onLoad" draw:mime-type="image/png">
            <text:p/>
          </draw:image>
        </draw:frame>
        <draw:frame draw:name="Google Shape;107;p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1.348cm" svg:height="4.734cm" svg:x="19.232cm" svg:y="13.604cm">
          <draw:image xlink:href="Pictures/10000001000001AD000000B3D5D08F3D.png" xlink:type="simple" xlink:show="embed" xlink:actuate="onLoad" draw:mime-type="image/png">
            <text:p/>
          </draw:image>
        </draw:frame>
        <draw:frame draw:style-name="gr3" draw:text-style-name="P15" draw:layer="layout" svg:width="15.675cm" svg:height="8.64cm" svg:x="1.139cm" svg:y="4.895cm">
          <draw:image xlink:href="Pictures/1000000000000379000001EABE1F2EDF.png" xlink:type="simple" xlink:show="embed" xlink:actuate="onLoad" draw:mime-type="image/png">
            <text:p/>
          </draw:image>
        </draw:frame>
        <draw:frame draw:style-name="gr3" draw:text-style-name="P15" draw:layer="layout" svg:width="11.083cm" svg:height="4.946cm" svg:x="3.522cm" svg:y="13.87cm">
          <draw:image xlink:href="Pictures/10000001000001A3000000BB005E66A8.png" xlink:type="simple" xlink:show="embed" xlink:actuate="onLoad" draw:mime-type="image/png">
            <text:p/>
          </draw:image>
        </draw:frame>
        <presentation:notes draw:style-name="dp3">
          <draw:frame draw:name="Google Shape;104;p4:notes 8" presentation:style-name="pr3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8" draw:style-name="gr2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2T11">
        <office:forms form:automatic-focus="false" form:apply-design-mode="false"/>
        <draw:frame draw:name="Google Shape;102;p 15" presentation:style-name="pr35" draw:text-style-name="P14" draw:layer="layout" svg:width="21.8cm" svg:height="12.086cm" svg:x="2.33cm" svg:y="5.071cm" presentation:class="outline" presentation:user-transformed="true">
          <draw:text-box>
            <text:p text:style-name="P16"><text:span text:style-name="T7">Расчет на кластере со следующими параметрами:</text:span></text:p>
            <text:p text:style-name="P16"><text:span text:style-name="T7">- наборов реплик: 1000,</text:span></text:p>
            <text:p text:style-name="P16"><text:span text:style-name="T7">- кардинальность данных: 1b,</text:span></text:p>
            <text:p text:style-name="P16"><text:span text:style-name="T7">- кардинальность вторичных ключей: 10:1,</text:span></text:p>
            <text:p text:style-name="P16"><text:span text:style-name="T7">- среднее время задержки между узлами: 10мс.</text:span></text:p>
          </draw:text-box>
        </draw:frame>
        <draw:frame draw:name="Google Shape;107;p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presentation:notes draw:style-name="dp3">
          <draw:frame draw:name="Google Shape;104;p4:notes 6" presentation:style-name="pr3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2" draw:layer="layout" svg:width="15.239cm" svg:height="8.572cm" svg:x="1.905cm" svg:y="3.175cm" draw:page-number="20" presentation:class="page"/>
        </presentation:notes>
      </draw:page>
      <draw:page draw:name="page21" draw:style-name="dp1" draw:master-page-name="OBJECT" presentation:presentation-page-layout-name="AL2T11">
        <office:forms form:automatic-focus="false" form:apply-design-mode="false"/>
        <draw:frame draw:name="Google Shape;107;p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draw:frame draw:style-name="gr3" draw:text-style-name="P15" draw:layer="layout" svg:width="14.605cm" svg:height="8.05cm" svg:x="1.905cm" svg:y="4.015cm">
          <draw:image xlink:href="Pictures/1000000000000379000001EAB7A98B09.png" xlink:type="simple" xlink:show="embed" xlink:actuate="onLoad" draw:mime-type="image/png">
            <text:p/>
          </draw:image>
        </draw:frame>
        <draw:frame draw:style-name="gr3" draw:text-style-name="P15" draw:layer="layout" svg:width="14.909cm" svg:height="8.218cm" svg:x="17.58cm" svg:y="3.945cm">
          <draw:image xlink:href="Pictures/1000000000000379000001EA0DEAE6BB.png" xlink:type="simple" xlink:show="embed" xlink:actuate="onLoad" draw:mime-type="image/png">
            <text:p/>
          </draw:image>
        </draw:frame>
        <draw:frame draw:style-name="gr3" draw:text-style-name="P15" draw:layer="layout" svg:width="10.554cm" svg:height="4.972cm" svg:x="4.051cm" svg:y="12.808cm">
          <draw:image xlink:href="Pictures/100000010000018F000000BC368AAC44.png" xlink:type="simple" xlink:show="embed" xlink:actuate="onLoad" draw:mime-type="image/png">
            <text:p/>
          </draw:image>
        </draw:frame>
        <draw:frame draw:style-name="gr3" draw:text-style-name="P15" draw:layer="layout" svg:width="11.03cm" svg:height="5.078cm" svg:x="19.685cm" svg:y="12.702cm">
          <draw:image xlink:href="Pictures/10000001000001A1000000C0911E141B.png" xlink:type="simple" xlink:show="embed" xlink:actuate="onLoad" draw:mime-type="image/png">
            <text:p/>
          </draw:image>
        </draw:frame>
        <presentation:notes draw:style-name="dp3">
          <draw:frame draw:name="Google Shape;104;p4:notes 9" presentation:style-name="pr3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9" draw:style-name="gr2" draw:layer="layout" svg:width="15.239cm" svg:height="8.572cm" svg:x="1.905cm" svg:y="3.175cm" draw:page-number="21" presentation:class="page"/>
        </presentation:notes>
      </draw:page>
      <draw:page draw:name="Результаты 2 (при необходимости)" draw:style-name="dp1" draw:master-page-name="OBJECT" presentation:presentation-page-layout-name="AL2T11">
        <office:forms form:automatic-focus="false" form:apply-design-mode="false"/>
        <draw:frame draw:name="Google Shape;119;p6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езультаты</text:span></text:p>
          </draw:text-box>
        </draw:frame>
        <draw:frame draw:style-name="gr5" draw:text-style-name="P19" draw:layer="layout" svg:width="0.502cm" svg:height="1.187cm" svg:x="16.632cm" svg:y="9.126cm">
          <draw:text-box>
            <text:p/>
          </draw:text-box>
        </draw:frame>
        <draw:frame draw:style-name="gr3" draw:text-style-name="P17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8" draw:text-style-name="P14" draw:layer="layout" svg:width="16.087cm" svg:height="12.086cm" svg:x="2.33cm" svg:y="5.071cm" presentation:class="outline" presentation:user-transformed="true">
          <draw:text-box>
            <text:p text:style-name="P16"><text:span text:style-name="T7">Математическая модель довольно точно приближенно вычисляет показатели эффективности на небольших кластерах.</text:span></text:p>
            <text:p text:style-name="P16"><text:span text:style-name="T7">Разработан плагин, реализующий глобальные вторичные индексы, для СУБД Picodata.</text:span></text:p>
          </draw:text-box>
        </draw:frame>
        <presentation:notes draw:style-name="dp2">
          <draw:frame draw:name="Google Shape;116;p6:notes" presentation:style-name="pr3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2" draw:layer="layout" svg:width="15.239cm" svg:height="8.572cm" svg:x="1.905cm" svg:y="3.175cm" draw:page-number="22" presentation:class="page"/>
        </presentation:notes>
      </draw:page>
      <draw:page draw:name="page23" draw:style-name="dp1" draw:master-page-name="OBJECT" presentation:presentation-page-layout-name="AL2T11">
        <office:forms form:automatic-focus="false" form:apply-design-mode="false"/>
        <draw:frame draw:name="Google Shape;119;p 1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азвитие работы</text:span></text:p>
          </draw:text-box>
        </draw:frame>
        <draw:frame draw:style-name="gr5" draw:text-style-name="P19" draw:layer="layout" svg:width="0.502cm" svg:height="1.187cm" svg:x="16.632cm" svg:y="9.126cm">
          <draw:text-box>
            <text:p/>
          </draw:text-box>
        </draw:frame>
        <draw:frame draw:name="Google Shape;102;p 13" presentation:style-name="pr40" draw:text-style-name="P14" draw:layer="layout" svg:width="14.18cm" svg:height="12.086cm" svg:x="2.33cm" svg:y="5.071cm" presentation:class="outline" presentation:user-transformed="true">
          <draw:text-box>
            <text:p text:style-name="P16"><text:span text:style-name="T7">Для повышения точности модели:</text:span></text:p>
            <text:p text:style-name="P16"><text:span text:style-name="T7">- рассмотреть вероятностную модель B+*-дерева</text:span></text:p>
            <text:p text:style-name="P16"><text:span text:style-name="T7">- рассмотреть случаи с “горячими” ключами</text:span></text:p>
            <text:p text:style-name="P16"><text:span text:style-name="T7">- подробнее изучить что влияет на скорость поиска в индексах</text:span></text:p>
          </draw:text-box>
        </draw:frame>
        <draw:frame draw:style-name="gr3" draw:text-style-name="P15" draw:layer="layout" svg:width="15.653cm" svg:height="7.62cm" svg:x="17.167cm" svg:y="6.35cm">
          <draw:image xlink:href="Pictures/100000010000034600000198A09B8021.png" xlink:type="simple" xlink:show="embed" xlink:actuate="onLoad" draw:mime-type="image/png">
            <text:p/>
          </draw:image>
        </draw:frame>
        <presentation:notes draw:style-name="dp3">
          <draw:frame draw:name="Google Shape;116;p6:notes 1" presentation:style-name="pr4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 1" draw:style-name="gr2" draw:layer="layout" svg:width="15.239cm" svg:height="8.572cm" svg:x="1.905cm" svg:y="3.175cm" draw:page-number="23" presentation:class="page"/>
        </presentation:notes>
      </draw:page>
      <draw:page draw:name="Выводы" draw:style-name="dp1" draw:master-page-name="OBJECT" presentation:presentation-page-layout-name="AL2T11">
        <office:forms form:automatic-focus="false" form:apply-design-mode="false"/>
        <draw:frame draw:name="Google Shape;126;p7" presentation:style-name="pr42" draw:text-style-name="P21" draw:layer="layout" svg:width="29.209cm" svg:height="12.086cm" svg:x="2.329cm" svg:y="3.482cm" presentation:class="outline" presentation:user-transformed="true">
          <draw:text-box>
            <text:p text:style-name="P20"><text:span text:style-name="T10">Спасибо за внимание</text:span></text:p>
          </draw:text-box>
        </draw:frame>
        <presentation:notes draw:style-name="dp2">
          <draw:frame draw:name="Google Shape;122;p7:notes" presentation:style-name="pr4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2" draw:layer="layout" svg:width="15.239cm" svg:height="8.572cm" svg:x="1.905cm" svg:y="3.175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20T16:49:37.304249062</dc:date>
    <meta:editing-duration>PT8H11M6S</meta:editing-duration>
    <meta:editing-cycles>49</meta:editing-cycles>
    <meta:generator>LibreOffice/25.8.7.3$Linux_X86_64 LibreOffice_project/580$Build-3</meta:generator>
    <meta:print-date>2026-05-09T20:31:46.360464980</meta:print-date>
    <meta:printed-by>PDF files</meta:printed-by>
    <meta:document-statistic meta:object-count="259"/>
  </office:meta>
</office:document-meta>
</file>