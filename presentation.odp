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D000001BC0A3D64AE.png" manifest:media-type="image/png"/>
  <manifest:file-entry manifest:full-path="Pictures/1001CB7F000044A000002BD23ED22CA2.pdf" manifest:media-type="application/pdf"/>
  <manifest:file-entry manifest:full-path="Pictures/1001BEE000003E8700002DE42BC1F83E.pdf" manifest:media-type="application/pdf"/>
  <manifest:file-entry manifest:full-path="Pictures/10000001000002BD000002BABBE7205A.png" manifest:media-type="image/png"/>
  <manifest:file-entry manifest:full-path="Pictures/100000010000031C000000920F1559BB.png" manifest:media-type="image/png"/>
  <manifest:file-entry manifest:full-path="Pictures/100000010000029A000000B69B10E1CC.png" manifest:media-type="image/png"/>
  <manifest:file-entry manifest:full-path="Pictures/1000000100000202000001BD296B9A32.png" manifest:media-type="image/png"/>
  <manifest:file-entry manifest:full-path="Pictures/1000000100000298000001A8F6148938.png" manifest:media-type="image/png"/>
  <manifest:file-entry manifest:full-path="Pictures/1000000100000323000000E6AC7E3D99.png" manifest:media-type="image/png"/>
  <manifest:file-entry manifest:full-path="Pictures/100000010000019F0000012CBECBB9C8.png" manifest:media-type="image/png"/>
  <manifest:file-entry manifest:full-path="Pictures/100000010000050E000000BD61010406.png" manifest:media-type="image/png"/>
  <manifest:file-entry manifest:full-path="Pictures/10013F3000002AE400001F02DB2B2891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1.02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1.82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92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1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1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style:font-name="CaskaydiaMono NF SemiLigh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23" style:family="paragraph">
      <loext:graphic-properties draw:fill="none"/>
      <style:paragraph-properties fo:margin-top="0.42cm" fo:margin-bottom="0.35cm"/>
      <style:text-properties style:font-name="CaskaydiaMono NF SemiLight" fo:font-size="10pt" style:font-size-asian="10pt" style:font-size-complex="10pt"/>
    </style:style>
    <style:style style:name="P24" style:family="paragraph">
      <loext:graphic-properties draw:fill="none"/>
      <style:paragraph-properties fo:text-align="center"/>
      <style:text-properties style:font-name="CaskaydiaMono NF SemiLight"/>
    </style:style>
    <style:style style:name="P2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weight="bold"/>
    </style:style>
    <style:style style:name="P26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1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1" fo:font-size="20pt" style:font-size-asian="20pt" style:font-size-complex="20pt"/>
    </style:style>
    <style:style style:name="T7" style:family="text">
      <style:text-properties style:font-name="CaskaydiaMono NF SemiLight1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skaydiaMono NF SemiLigh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36pt" fo:letter-spacing="normal" fo:language="ru" fo:country="RU" fo:font-style="normal" style:text-underline-style="none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</text:span><text:span text:style-name="T1">сравнительный анализ его производительности с </text:span><text:span text:style-name="T1">локальными индексами в распределенной СУБД </text:span><text:span text:style-name="T1">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05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" presentation:style-name="pr6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ключам высокой кардинальности ввиду </text:span><text:span text:style-name="T6">стратегии сегментирования данных в кластере СУБД Picodata.</text:span></text:p>
            <text:p text:style-name="P13"><text:span text:style-name="T6">Каждый запрос опрашивает весь кластер, что приводит к блокировке </text:span><text:span text:style-name="T6">исполнения заявок других клиентов на время поиска.</text:span></text:p>
          </draw:text-box>
        </draw:frame>
        <draw:frame draw:style-name="gr3" draw:text-style-name="P15" draw:layer="layout" svg:width="11.526cm" svg:height="0.962cm" svg:x="21.59cm" svg:y="5.08cm">
          <draw:text-box>
            <text:p>+картинка примера сегментирования</text:p>
          </draw:text-box>
        </draw:frame>
        <draw:frame draw:style-name="gr4" draw:text-style-name="P6" draw:layer="layout" svg:width="10.979cm" svg:height="7.937cm" svg:x="20.072cm" svg:y="10.342cm">
          <draw:image xlink:href="Pictures/10013F3000002AE400001F02DB2B2891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3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</text:span><text:span text:style-name="T5">к</text:span><text:span text:style-name="T5">т</text:span><text:span text:style-name="T5">у</text:span><text:span text:style-name="T5">а</text:span><text:span text:style-name="T5">л</text:span><text:span text:style-name="T5">ь</text:span><text:span text:style-name="T5">н</text:span><text:span text:style-name="T5">о</text:span><text:span text:style-name="T5">с</text:span><text:span text:style-name="T5">т</text:span><text:span text:style-name="T5">ь</text:span></text:p>
          </draw:text-box>
        </draw:frame>
        <draw:frame draw:name="Google Shape;102;p 2" presentation:style-name="pr8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Распределение нагрузки на несколько серверов – необходимость в случае крупных цифровых </text:span><text:span text:style-name="T7">продуктов.</text:span></text:p>
            <text:p text:style-name="P16"><text:span text:style-name="T7">Вторичные индексы – это важнейший инструмент по обеспечению быстрого поиска в СУБД.</text:span></text:p>
            <text:p text:style-name="P16"><text:span text:style-name="T8">При поиске в локальном вторичном индексе (ЛВИ), количество сетевых запросов растет линейно </text:span><text:span text:style-name="T8">количеству узлов в кластере. Также растет </text:span><text:span text:style-name="T7">общее потребление ЦПУ.</text:span></text:p>
          </draw:text-box>
        </draw:frame>
        <draw:frame draw:style-name="gr5" draw:text-style-name="P17" draw:layer="layout" svg:width="13.599cm" svg:height="11.773cm" svg:x="19.421cm" svg:y="3.81cm">
          <draw:image xlink:href="Pictures/1000000100000202000001BD296B9A32.png" xlink:type="simple" xlink:show="embed" xlink:actuate="onLoad" draw:mime-type="image/png">
            <text:p/>
          </draw:image>
        </draw:frame>
        <presentation:notes draw:style-name="dp3">
          <draw:frame draw:name="Google Shape;98;p3:notes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0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(ГВИ) - </text:span><text:span text:style-name="T7">индексная структура с сегментацией данных, </text:span><text:span text:style-name="T7">отличной от сегментации индексируемой </text:span><text:span text:style-name="T7">таблицы.</text:span></text:p>
            <text:p text:style-name="P16"><text:span text:style-name="T7">Такая структура позволяет максимально </text:span><text:span text:style-name="T7">оптимизировать поиск по вторичным ключам </text:span><text:span text:style-name="T7">высокой кардинальности. В иных случаях он </text:span><text:span text:style-name="T7">практически не уступает ЛВИ.</text:span></text:p>
            <text:p text:style-name="P16"><text:span text:style-name="T7">Недостаток: обновление записи происходит с </text:span><text:span text:style-name="T7">двумя дополнительными сетевыми запросами </text:span><text:span text:style-name="T7">по сравнению с ЛВИ.</text:span></text:p>
          </draw:text-box>
        </draw:frame>
        <draw:frame draw:style-name="gr3" draw:text-style-name="P15" draw:layer="layout" svg:width="11.526cm" svg:height="0.962cm" svg:x="20.955cm" svg:y="5.715cm">
          <draw:text-box>
            <text:p>+картинка примера сегментирования</text:p>
          </draw:text-box>
        </draw:frame>
        <presentation:notes draw:style-name="dp3">
          <draw:frame draw:name="Google Shape;98;p3:notes 3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2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Дать заказчикам возможность выбора </text:span><text:span text:style-name="T7">индексной структуры, подходящей под их </text:span><text:span text:style-name="T7">нужды.</text:span></text:p>
            <text:p text:style-name="P16"><text:span text:style-name="T7">Выбор зависит от множества параметров:</text:span></text:p>
            <text:p text:style-name="P16"><text:span text:style-name="T7">- размер кластера,</text:span></text:p>
            <text:p text:style-name="P16"><text:span text:style-name="T7">- нагрузка на кластер, ее вид,</text:span></text:p>
            <text:p text:style-name="P16"><text:span text:style-name="T7">- скорость сети между узлами,</text:span></text:p>
            <text:p text:style-name="P16"><text:span text:style-name="T7">- ...</text:span></text:p>
            <text:p text:style-name="P16"><text:span text:style-name="T7">Необходимо создать способ рассчитать </text:span><text:span text:style-name="T7">эффективность индексов по этим </text:span><text:span text:style-name="T7">параметрам. </text:span></text:p>
          </draw:text-box>
        </draw:frame>
        <draw:frame draw:style-name="gr6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4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14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1. Составить математическую модель обеих </text:span><text:span text:style-name="T7">индексных структур.</text:span></text:p>
            <text:p text:style-name="P16"><text:span text:style-name="T7">2. Разработать плагин ГВИ для СУБД </text:span><text:span text:style-name="T7">Picodata.</text:span></text:p>
            <text:p text:style-name="P16"><text:span text:style-name="T7">3. Проверить точность математической </text:span><text:span text:style-name="T7">модели с помощью множества натурных </text:span><text:span text:style-name="T7">экспериментов малого масштаба.</text:span></text:p>
            <text:p text:style-name="P16"><text:span text:style-name="T7">4. С помощью модели найти параметры, при </text:span><text:span text:style-name="T7">которых каждая индексная структура </text:span><text:span text:style-name="T7">показывает себя лучше другой и составить </text:span><text:span text:style-name="T7">справочные материалы по их использованию.</text:span></text:p>
          </draw:text-box>
        </draw:frame>
        <draw:frame draw:style-name="gr6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5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равнение с аналогами</text:span></text:p>
          </draw:text-box>
        </draw:frame>
        <draw:frame draw:name="Google Shape;102;p 6" presentation:style-name="pr16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6" draw:text-style-name="P15" draw:layer="layout" svg:width="12.324cm" svg:height="0.962cm" svg:x="20.32cm" svg:y="6.35cm">
          <draw:text-box>
            <text:p>хочется какую-то картинку тут наверное</text:p>
          </draw:text-box>
        </draw:frame>
        <presentation:notes draw:style-name="dp3">
          <draw:frame draw:name="Google Shape;98;p3:notes 6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7" presentation:class="page"/>
        </presentation:notes>
      </draw:page>
      <draw:page draw:name="Дизайн исследования" draw:style-name="dp1" draw:master-page-name="OBJECT" presentation:presentation-page-layout-name="AL2T11"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18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СУБД моделируется как N СМО M/G/1, где N - </text:span><text:span text:style-name="T7">количество наборов реплик в кластере.</text:span></text:p>
            <text:p text:style-name="P16"><text:span text:style-name="T7">В модели учитывается время работы узла и </text:span><text:span text:style-name="T7">передача результатов по сети.</text:span></text:p>
            <text:p text:style-name="P16"><text:span text:style-name="T7">Предполагается равномерное распределение </text:span><text:span text:style-name="T7">данных в кластере.</text:span></text:p>
            <text:p text:style-name="P16"><text:span text:style-name="T7"/></text:p>
          </draw:text-box>
        </draw:frame>
        <draw:frame draw:style-name="gr5" draw:text-style-name="P17" draw:layer="layout" svg:width="10.786cm" svg:height="1.575cm" svg:x="20.229cm" svg:y="4.8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5" draw:text-style-name="P17" draw:layer="layout" svg:width="11.43cm" svg:height="3.273cm" svg:x="19.785cm" svg:y="10.9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5" draw:text-style-name="P17" draw:layer="layout" svg:width="10.282cm" svg:height="2.809cm" svg:x="20.42cm" svg:y="7.2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5" draw:text-style-name="P17" draw:layer="layout" svg:width="9.055cm" svg:height="1.66cm" svg:x="20.925cm" svg:y="15.2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2">
          <draw:frame draw:name="Google Shape;104;p4:notes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2T11"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0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6"><text:span text:style-name="T7">Предоставлены ориентировочные значения каждого параметра для удобства моделирования.</text:span></text:p>
          </draw:text-box>
        </draw:frame>
        <draw:frame draw:style-name="gr7" draw:text-style-name="P15" draw:layer="layout" svg:width="7.279cm" svg:height="0.962cm" svg:x="22.86cm" svg:y="8.563cm">
          <draw:text-box>
            <text:p>картинка из прометея?</text:p>
          </draw:text-box>
        </draw:frame>
        <presentation:notes draw:style-name="dp1">
          <draw:frame draw:name="Google Shape;104;p4:notes 3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2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В качестве результата, модель возвращает значения четырех показателей эффективности:</text:span></text:p>
            <text:p text:style-name="P16"><text:span text:style-name="T7">- максимальная нагрузка на кластер</text:span></text:p>
            <text:p text:style-name="P16"><text:span text:style-name="T7">- вероятность необслуживания запроса ввиду таймаута</text:span></text:p>
            <text:p text:style-name="P16"><text:span text:style-name="T8">- среднее время ожидания </text:span><text:span text:style-name="T7">пользователем ответа от СУБД</text:span></text:p>
            <text:p text:style-name="P16"><text:span text:style-name="T7">- среднее время нахождения заявки в очереди</text:span></text:p>
          </draw:text-box>
        </draw:frame>
        <draw:frame draw:style-name="gr8" draw:text-style-name="P18" draw:layer="layout" svg:width="8.255cm" svg:height="3.175cm" svg:x="23.495cm" svg:y="5.715cm">
          <draw:text-box>
            <text:p>тут графики и результаты на тестовом кластере модели</text:p>
          </draw:text-box>
        </draw:frame>
        <presentation:notes draw:style-name="dp3">
          <draw:frame draw:name="Google Shape;104;p4:notes 1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Глобальный вторичный индекс</text:span></text:p>
          </draw:text-box>
        </draw:frame>
        <draw:frame draw:name="Google Shape;102;p 12" presentation:style-name="pr24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Реализован в виде плагина к СУБД Picodata на Rust.</text:span></text:p>
            <text:p text:style-name="P16"><text:span text:style-name="T7">Доступ к взаимодействию пока только через HTTP-запросы, в будущем планируется встроить в планировщик SQL СУБД.</text:span></text:p>
            <text:p text:style-name="P16"><text:span text:style-name="T7"/></text:p>
          </draw:text-box>
        </draw:frame>
        <draw:frame draw:style-name="gr9" draw:text-style-name="P18" draw:layer="layout" svg:width="7.62cm" svg:height="3.095cm" svg:x="23.495cm" svg:y="5.715cm">
          <draw:text-box>
            <text:p>картинка архитектуры</text:p>
          </draw:text-box>
        </draw:frame>
        <presentation:notes draw:style-name="dp1">
          <draw:frame draw:name="Google Shape;104;p4:notes 4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draw:frame draw:name="Google Shape;107;p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name="Google Shape;102;p 13" presentation:style-name="pr26" draw:text-style-name="P14" draw:layer="layout" svg:width="29.421cm" svg:height="5.089cm" svg:x="2.329cm" svg:y="5.071cm" presentation:class="outline" presentation:user-transformed="true">
          <draw:text-box>
            <text:p text:style-name="P16"><text:span text:style-name="T7">Алгоритм поиска по ГВИ позволяет найти записи минимум за 6 сетевых запросов, максимум – за N + 4 при той же нагрузке на ЦПУ, что и в ЛВИ.</text:span></text:p>
            <text:p text:style-name="P16"><text:span text:style-name="T7">Обновление ГВИ происходит за 4 сетевых запроса, что при небольшой кардинальности данных может оказаться в два раза медленнее, чем обновление ЛВИ.</text:span></text:p>
          </draw:text-box>
        </draw:frame>
        <draw:frame draw:style-name="gr4" draw:text-style-name="P6" draw:layer="layout" svg:width="13.335cm" svg:height="9.787cm" svg:x="18.285cm" svg:y="8.828cm">
          <draw:image xlink:href="Pictures/1001BEE000003E8700002DE42BC1F83E.pdf" xlink:type="simple" xlink:show="embed" xlink:actuate="onLoad" draw:mime-type="application/pdf" loext:page-number="0">
            <text:p/>
          </draw:image>
          <draw:image xlink:href="Pictures/100000010000025D000001BC0A3D64AE.png" xlink:type="simple" xlink:show="embed" xlink:actuate="onLoad" draw:mime-type="image/png"/>
        </draw:frame>
        <draw:frame draw:style-name="gr10" draw:text-style-name="P19" draw:layer="layout" svg:width="14.402cm" svg:height="9.196cm" svg:x="2.165cm" svg:y="9.219cm">
          <draw:image xlink:href="Pictures/1001CB7F000044A000002BD23ED22CA2.pdf" xlink:type="simple" xlink:show="embed" xlink:actuate="onLoad" draw:mime-type="application/pdf" loext:page-number="0">
            <text:p text:style-name="P13"><text:span text:style-name="T9"/></text:p>
          </draw:image>
          <draw:image xlink:href="Pictures/1000000100000298000001A8F6148938.png" xlink:type="simple" xlink:show="embed" xlink:actuate="onLoad" draw:mime-type="image/png"/>
        </draw:frame>
        <presentation:notes draw:style-name="dp1">
          <draw:frame draw:name="Google Shape;104;p4:notes 5" presentation:style-name="pr2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5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28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Были проведены эксперименты на </text:span><text:span text:style-name="T7">кластерах со следующими параметрами:</text:span></text:p>
            <text:p text:style-name="P16"><text:span text:style-name="T7">- наборов реплик: 5, 25, 125,</text:span></text:p>
            <text:p text:style-name="P16"><text:span text:style-name="T7">- кардинальность данных: 100k, 10m, 1b,</text:span></text:p>
            <text:p text:style-name="P16"><text:span text:style-name="T7">- кардинальность вторичных ключей: 1:1, </text:span><text:span text:style-name="T7">100:1, 10k:1,</text:span></text:p>
            <text:p text:style-name="P16"><text:span text:style-name="T7">- среднее время задержки между узлами: </text:span><text:span text:style-name="T7">10мс, 50мс.</text:span></text:p>
          </draw:text-box>
        </draw:frame>
        <draw:frame draw:style-name="gr9" draw:text-style-name="P21" draw:layer="layout" svg:width="6.985cm" svg:height="3.095cm" svg:x="23.495cm" svg:y="5.715cm">
          <draw:text-box>
            <text:p text:style-name="P20">показатели эффективности и их разность</text:p>
          </draw:text-box>
        </draw:frame>
        <presentation:notes draw:style-name="dp1">
          <draw:frame draw:name="Google Shape;104;p4:notes 2" presentation:style-name="pr2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02;p 15" presentation:style-name="pr30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Были проведены эксперименты на кластерах со следующими параметрами:</text:span></text:p>
            <text:p text:style-name="P16"><text:span text:style-name="T7">- наборов реплик: 1000,</text:span></text:p>
            <text:p text:style-name="P16"><text:span text:style-name="T7">- кардинальность данных: 100b, 10t,</text:span></text:p>
            <text:p text:style-name="P16"><text:span text:style-name="T7">- кардинальность вторичных ключей: 1:1, 10:1,</text:span></text:p>
            <text:p text:style-name="P16"><text:span text:style-name="T7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9" draw:text-style-name="P21" draw:layer="layout" svg:width="6.985cm" svg:height="3.095cm" svg:x="23.495cm" svg:y="5.715cm">
          <draw:text-box>
            <text:p text:style-name="P20">результаты модели</text:p>
          </draw:text-box>
        </draw:frame>
        <presentation:notes draw:style-name="dp1">
          <draw:frame draw:name="Google Shape;104;p4:notes 6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14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draw:frame draw:name="Google Shape;119;p6" presentation:style-name="pr5" draw:text-style-name="P22" draw:layer="layout" svg:width="29.209cm" svg:height="3.681cm" svg:x="2.328cm" svg:y="1.014cm" presentation:class="title" presentation:user-transformed="true">
          <draw:text-box>
            <text:p text:style-name="P11"><text:span text:style-name="T10">Результаты</text:span></text:p>
          </draw:text-box>
        </draw:frame>
        <draw:frame draw:style-name="gr11" draw:text-style-name="P23" draw:layer="layout" svg:width="0.502cm" svg:height="1.187cm" svg:x="16.632cm" svg:y="9.126cm">
          <draw:text-box>
            <text:p/>
          </draw:text-box>
        </draw:frame>
        <draw:frame draw:style-name="gr5" draw:text-style-name="P24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2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Математическая модель довольно точно приближенно вычисляет показатели эффективности на небольших кластерах.</text:span></text:p>
            <text:p text:style-name="P16"><text:span text:style-name="T7">Модель способна давать точные результаты и на больших кластерах с большой нагрузкой.</text:span></text:p>
          </draw:text-box>
        </draw:frame>
        <presentation:notes draw:style-name="dp2">
          <draw:frame draw:name="Google Shape;116;p6:notes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15" presentation:class="page"/>
        </presentation:notes>
      </draw:page>
      <draw:page draw:name="Выводы" draw:style-name="dp1" draw:master-page-name="OBJECT" presentation:presentation-page-layout-name="AL2T11">
        <draw:frame draw:name="Google Shape;126;p7" presentation:style-name="pr34" draw:text-style-name="P26" draw:layer="layout" svg:width="29.209cm" svg:height="12.086cm" svg:x="2.329cm" svg:y="3.482cm" presentation:class="outline" presentation:user-transformed="true">
          <draw:text-box>
            <text:p text:style-name="P25"><text:span text:style-name="T11">Спасибо за внимание</text:span></text:p>
          </draw:text-box>
        </draw:frame>
        <presentation:notes draw:style-name="dp2">
          <draw:frame draw:name="Google Shape;122;p7:notes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09T20:32:28.523223739</dc:date>
    <meta:editing-duration>PT3H59M57S</meta:editing-duration>
    <meta:editing-cycles>32</meta:editing-cycles>
    <meta:generator>LibreOffice/25.8.6.2$Linux_X86_64 LibreOffice_project/88069fac6043c7b6e761a49b8d5046c99f4d3400</meta:generator>
    <meta:print-date>2026-05-09T20:31:46.360464980</meta:print-date>
    <meta:printed-by>PDF files</meta:printed-by>
    <meta:document-statistic meta:object-count="219"/>
  </office:meta>
</office:document-meta>
</file>