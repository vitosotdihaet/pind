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D000002BABBE7205A.png" manifest:media-type="image/png"/>
  <manifest:file-entry manifest:full-path="Pictures/10000001000001A1000000C0911E141B.png" manifest:media-type="image/png"/>
  <manifest:file-entry manifest:full-path="Pictures/100000010000018F000000BC368AAC44.png" manifest:media-type="image/png"/>
  <manifest:file-entry manifest:full-path="Pictures/1000000000000379000001EA0DEAE6BB.png" manifest:media-type="image/png"/>
  <manifest:file-entry manifest:full-path="Pictures/1000000000000379000001EAB7A98B09.png" manifest:media-type="image/png"/>
  <manifest:file-entry manifest:full-path="Pictures/100000010000050E000000BD61010406.png" manifest:media-type="image/png"/>
  <manifest:file-entry manifest:full-path="Pictures/100000010000029A000000B69B10E1CC.png" manifest:media-type="image/png"/>
  <manifest:file-entry manifest:full-path="Pictures/1000000000000379000001EABE1F2EDF.png" manifest:media-type="image/png"/>
  <manifest:file-entry manifest:full-path="Pictures/1001BEE000003E8700002DE4EE26A3AA.pdf" manifest:media-type="application/pdf"/>
  <manifest:file-entry manifest:full-path="Pictures/100000010000019F0000012CBECBB9C8.png" manifest:media-type="image/png"/>
  <manifest:file-entry manifest:full-path="Pictures/10000001000002E4000001B0EE0BE758.png" manifest:media-type="image/png"/>
  <manifest:file-entry manifest:full-path="Pictures/100000010000028C000001247F0DA8A3.png" manifest:media-type="image/png"/>
  <manifest:file-entry manifest:full-path="Pictures/10000001000001A3000000BB005E66A8.png" manifest:media-type="image/png"/>
  <manifest:file-entry manifest:full-path="Pictures/1000000100000202000001BD296B9A32.png" manifest:media-type="image/png"/>
  <manifest:file-entry manifest:full-path="Pictures/1001DF010000436300001E2E77AB52C0.pdf" manifest:media-type="application/pdf"/>
  <manifest:file-entry manifest:full-path="Pictures/1000000000000379000001EA6DF73825.png" manifest:media-type="image/png"/>
  <manifest:file-entry manifest:full-path="Pictures/10000000000002580000025828CED5F2.png" manifest:media-type="image/png"/>
  <manifest:file-entry manifest:full-path="Pictures/10013F3000002AE400001F02864B0229.pdf" manifest:media-type="application/pdf"/>
  <manifest:file-entry manifest:full-path="Pictures/100000010000027C000001248290F1FA.png" manifest:media-type="image/png"/>
  <manifest:file-entry manifest:full-path="Pictures/100000010000034600000198A09B8021.png" manifest:media-type="image/png"/>
  <manifest:file-entry manifest:full-path="Pictures/1001F26A000041BC00001E2E0A1032A6.pdf" manifest:media-type="application/pdf"/>
  <manifest:file-entry manifest:full-path="Pictures/1000000100000500000005009E8D18F3.png" manifest:media-type="image/png"/>
  <manifest:file-entry manifest:full-path="Pictures/100000010000031C000000920F1559BB.png" manifest:media-type="image/png"/>
  <manifest:file-entry manifest:full-path="Pictures/100000010000019D000000BB5FE70595.png" manifest:media-type="image/png"/>
  <manifest:file-entry manifest:full-path="Pictures/100000010000025D000001BC0A3D64AE.png" manifest:media-type="image/png"/>
  <manifest:file-entry manifest:full-path="Pictures/10000001000004B000000436C2E9BAD7.png" manifest:media-type="image/png"/>
  <manifest:file-entry manifest:full-path="Pictures/1000000100000298000001A8F6148938.png" manifest:media-type="image/png"/>
  <manifest:file-entry manifest:full-path="Pictures/1001D4FD00004C7B00002CA62F721754.pdf" manifest:media-type="application/pdf"/>
  <manifest:file-entry manifest:full-path="Pictures/10000000000004B0000002D0E860049D.png" manifest:media-type="image/png"/>
  <manifest:file-entry manifest:full-path="Pictures/10000000000004B0000002D0946A218E.png" manifest:media-type="image/png"/>
  <manifest:file-entry manifest:full-path="Pictures/10000001000001AA000000D78E8F3CE7.png" manifest:media-type="image/png"/>
  <manifest:file-entry manifest:full-path="Pictures/1000000100000323000000E6AC7E3D99.png" manifest:media-type="image/png"/>
  <manifest:file-entry manifest:full-path="Pictures/1000000000000379000001EA277BB3BF.png" manifest:media-type="image/png"/>
  <manifest:file-entry manifest:full-path="Pictures/1001CB7F000044A000002BD2FB357736.pdf" manifest:media-type="application/pdf"/>
  <manifest:file-entry manifest:full-path="Pictures/10000001000001AF000000BCC923A9D4.png" manifest:media-type="image/png"/>
  <manifest:file-entry manifest:full-path="Pictures/10000000000003620000028AAF43F2CB.jpg" manifest:media-type="image/jpeg"/>
  <manifest:file-entry manifest:full-path="Pictures/10000001000001AD000000B3D5D08F3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pitch="fixed"/>
    <style:font-face style:name="CaskaydiaMono NF SemiLight1" svg:font-family="'CaskaydiaMono NF SemiLight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left" draw:textarea-vertical-align="botto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937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left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4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OBJECT-outline1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60pt"/>
    </style:style>
    <style:style style:name="P3" style:family="paragraph">
      <style:paragraph-properties fo:margin-left="0cm" fo:margin-right="0cm" fo:margin-top="0cm" fo:margin-bottom="0cm" fo:line-height="7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353cm" fo:margin-bottom="0cm" fo:line-height="7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7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2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999999" loext:opacity="100%" style:font-name="CaskaydiaMono NF SemiLigh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4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CaskaydiaMono NF SemiLight" fo:font-size="20pt" style:font-size-asian="20pt" style:font-size-complex="20pt" fo:hyphenate="false" loext:hyphenation-no-caps="false" loext:hyphenation-no-last-word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.203cm" fo:margin-top="0.5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text-align="center"/>
      <style:text-properties style:font-name="CaskaydiaMono NF SemiLight1"/>
    </style:style>
    <style:style style:name="P18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44pt"/>
    </style:style>
    <style:style style:name="P19" style:family="paragraph">
      <loext:graphic-properties draw:fill="none"/>
      <style:paragraph-properties fo:margin-top="0.42cm" fo:margin-bottom="0.35cm"/>
      <style:text-properties style:font-name="CaskaydiaMono NF SemiLight1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90%" fo:text-align="center" fo:text-indent="0cm" style:font-independent-line-spacing="true"/>
      <style:text-properties style:font-name="CaskaydiaMono NF SemiLight1" fo:font-size="36pt" fo:font-weight="bold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60pt" fo:letter-spacing="normal" fo:language="ru" fo:country="RU" fo:font-style="normal" style:text-underline-style="none" fo:font-weight="normal" fo:background-color="transparent" style:font-name-asian="Calibri" style:font-size-asian="60pt" style:font-style-asian="normal" style:font-weight-asian="normal" style:font-name-complex="Calibri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18.6000003814697pt" fo:letter-spacing="normal" fo:language="ru" fo:country="RU" fo:font-style="normal" style:text-underline-style="none" fo:font-weight="normal" fo:background-color="transparent" style:font-name-asian="Calibri" style:font-size-asian="18.6000003814697pt" style:font-style-asian="normal" style:font-weight-asian="normal" style:font-name-complex="Calibri" style:font-size-complex="18.6000003814697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999999" loext:opacity="100%" style:font-name="CaskaydiaMono NF SemiLight"/>
    </style:style>
    <style:style style:name="T4" style:family="text">
      <style:text-properties fo:font-variant="normal" fo:text-transform="none" style:text-line-through-style="none" style:text-line-through-type="none" style:text-position="0% 100%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style:font-name="CaskaydiaMono NF SemiLight" fo:font-size="20pt" style:font-size-asian="20pt" style:font-size-complex="20pt"/>
    </style:style>
    <style:style style:name="T7" style:family="text">
      <style:text-properties style:font-name="CaskaydiaMono NF SemiLight" fo:font-size="18pt" style:font-size-asian="18pt" style:font-size-complex="1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36pt" fo:letter-spacing="normal" fo:language="ru" fo:country="RU" fo:font-style="normal" style:text-underline-style="none" fo:font-weight="bold" fo:background-color="transparent" style:font-name-asian="Calibri" style:font-size-asian="36pt" style:font-style-asian="normal" style:font-weight-asian="normal" style:font-name-complex="Calibri" style:font-size-complex="36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○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ТЕМА" draw:style-name="dp1" draw:master-page-name="TITLE" presentation:presentation-page-layout-name="AL1T0">
        <office:forms form:automatic-focus="false" form:apply-design-mode="false"/>
        <draw:frame draw:name="Google Shape;95;p2" presentation:style-name="pr1" draw:text-style-name="P2" draw:layer="layout" svg:width="25.399cm" svg:height="6.631cm" svg:x="4.234cm" svg:y="6.069cm" presentation:class="title" presentation:user-transformed="true">
          <draw:text-box>
            <text:p text:style-name="P1"><text:span text:style-name="T1">Реализация глобального вторичного индекса и сравнительный анализ его производительности с локальными индексами в распределенной СУБД Picodata</text:span></text:p>
          </draw:text-box>
        </draw:frame>
        <draw:frame draw:name="Google Shape;96;p2" presentation:style-name="pr2" draw:text-style-name="P5" draw:layer="layout" svg:width="25.399cm" svg:height="1.905cm" svg:x="0.635cm" svg:y="16.51cm" presentation:class="subtitle" presentation:user-transformed="true">
          <draw:text-box>
            <text:p text:style-name="P3"><text:span text:style-name="T2">Выполнил: Клименко В.М. М8О-403Б-22</text:span></text:p>
            <text:p text:style-name="P4"><text:span text:style-name="T2">Научный руководитель: канд. техн. наук, доц. Романенков А.М.</text:span></text:p>
          </draw:text-box>
        </draw:frame>
        <draw:frame draw:style-name="gr1" draw:text-style-name="P7" draw:layer="layout" svg:width="25.4cm" svg:height="1.979cm" svg:x="4.233cm" svg:y="12.18cm">
          <draw:text-box>
            <text:p text:style-name="P6"><text:span text:style-name="T3">Московский авиационный институт</text:span></text:p>
            <text:p text:style-name="P6"><text:span text:style-name="T3">(национальный исследовательский университет)</text:span></text:p>
          </draw:text-box>
        </draw:frame>
        <presentation:notes draw:style-name="dp2">
          <draw:page-thumbnail draw:name="Google Shape;91;p2:notes" draw:style-name="gr2" draw:layer="layout" svg:width="15.239cm" svg:height="8.572cm" svg:x="1.905cm" svg:y="3.175cm" draw:page-number="1" presentation:class="page"/>
          <draw:frame draw:name="Google Shape;92;p2:notes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;p2:notes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OBJECT" presentation:presentation-page-layout-name="AL2T11">
        <office:forms form:automatic-focus="false" form:apply-design-mode="false"/>
        <draw:frame draw:name="Google Shape;101;p 1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Предметная область</text:span></text:p>
          </draw:text-box>
        </draw:frame>
        <draw:frame draw:name="Google Shape;102;p 1" presentation:style-name="pr6" draw:text-style-name="P14" draw:layer="layout" svg:width="14.817cm" svg:height="12.086cm" svg:x="2.328cm" svg:y="5.071cm" presentation:class="outline" presentation:user-transformed="true">
          <draw:text-box>
            <text:p text:style-name="P13"><text:span text:style-name="T6">Объект работы: индексирование данных </text:span><text:span text:style-name="T6">в распределенных СУБД</text:span></text:p>
            <text:p text:style-name="P13"><text:span text:style-name="T6">Предмет работы: глобальный вторичный </text:span><text:span text:style-name="T6">индекс в распределенной СУБД Picodata</text:span></text:p>
          </draw:text-box>
        </draw:frame>
        <presentation:notes draw:style-name="dp3">
          <draw:frame draw:name="Google Shape;98;p3:notes 1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1" draw:style-name="gr2" draw:layer="layout" svg:width="15.239cm" svg:height="8.572cm" svg:x="1.905cm" svg:y="3.175cm" draw:page-number="2" presentation:class="page"/>
        </presentation:notes>
      </draw:page>
      <draw:page draw:name="page3" draw:style-name="dp1" draw:master-page-name="OBJECT" presentation:presentation-page-layout-name="AL2T11">
        <office:forms form:automatic-focus="false" form:apply-design-mode="false"/>
        <draw:frame draw:name="Google Shape;101;p 7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Проблема</text:span></text:p>
          </draw:text-box>
        </draw:frame>
        <draw:frame draw:name="Google Shape;102;p 14" presentation:style-name="pr8" draw:text-style-name="P14" draw:layer="layout" svg:width="12.912cm" svg:height="12.086cm" svg:x="2.328cm" svg:y="5.071cm" presentation:class="outline" presentation:user-transformed="true">
          <draw:text-box>
            <text:p text:style-name="P13"><text:span text:style-name="T6">Неэффективный поиск по вторичным </text:span><text:span text:style-name="T6">ключам высокой кардинальности ввиду </text:span><text:span text:style-name="T6">стратегии сегментирования индекса в </text:span><text:span text:style-name="T6">кластере СУБД Picodata.</text:span></text:p>
            <text:p text:style-name="P13"><text:span text:style-name="T6">Каждый запрос опрашивает весь </text:span><text:span text:style-name="T6">кластер, что приводит к блокировке </text:span><text:span text:style-name="T6">исполнения заявок других клиентов на </text:span><text:span text:style-name="T6">время поиска.</text:span></text:p>
          </draw:text-box>
        </draw:frame>
        <draw:frame draw:style-name="gr3" draw:text-style-name="P15" draw:layer="layout" svg:width="17.981cm" svg:height="8.255cm" svg:x="15.039cm" svg:y="10.795cm">
          <draw:image xlink:href="Pictures/1001F26A000041BC00001E2E0A1032A6.pdf" xlink:type="simple" xlink:show="embed" xlink:actuate="onLoad" draw:mime-type="application/pdf" loext:page-number="0">
            <text:p/>
          </draw:image>
          <draw:image xlink:href="Pictures/100000010000027C000001248290F1FA.png" xlink:type="simple" xlink:show="embed" xlink:actuate="onLoad" draw:mime-type="image/png"/>
        </draw:frame>
        <draw:frame draw:style-name="gr3" draw:text-style-name="P15" draw:layer="layout" svg:width="11.614cm" svg:height="8.396cm" svg:x="18.566cm" svg:y="2.081cm">
          <draw:image xlink:href="Pictures/10013F3000002AE400001F02864B0229.pdf" xlink:type="simple" xlink:show="embed" xlink:actuate="onLoad" draw:mime-type="application/pdf" loext:page-number="0">
            <text:p/>
          </draw:image>
          <draw:image xlink:href="Pictures/100000010000019F0000012CBECBB9C8.png" xlink:type="simple" xlink:show="embed" xlink:actuate="onLoad" draw:mime-type="image/png"/>
        </draw:frame>
        <presentation:notes draw:style-name="dp3">
          <draw:frame draw:name="Google Shape;98;p3:notes 7" presentation:style-name="pr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7" draw:style-name="gr2" draw:layer="layout" svg:width="15.239cm" svg:height="8.572cm" svg:x="1.905cm" svg:y="3.175cm" draw:page-number="3" presentation:class="page"/>
        </presentation:notes>
      </draw:page>
      <draw:page draw:name="page4" draw:style-name="dp1" draw:master-page-name="OBJECT" presentation:presentation-page-layout-name="AL2T11">
        <office:forms form:automatic-focus="false" form:apply-design-mode="false"/>
        <draw:frame draw:name="Google Shape;101;p 2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Актуальность</text:span></text:p>
          </draw:text-box>
        </draw:frame>
        <draw:frame draw:name="Google Shape;102;p 2" presentation:style-name="pr10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Распределение нагрузки на несколько серверов – необходимость в случае крупных цифровых продуктов.</text:span></text:p>
            <text:p text:style-name="P16"><text:span text:style-name="T7">Вторичные индексы – это важнейший инструмент по обеспечению быстрого поиска в СУБД.</text:span></text:p>
            <text:p text:style-name="P16"><text:span text:style-name="T8">При поиске в локальном вторичном индексе (ЛВИ), количество сетевых запросов растет линейно количеству узлов в кластере. Также растет </text:span><text:span text:style-name="T7">общее потребление ЦПУ.</text:span></text:p>
          </draw:text-box>
        </draw:frame>
        <draw:frame draw:style-name="gr3" draw:text-style-name="P15" draw:layer="layout" svg:width="13.599cm" svg:height="11.773cm" svg:x="19.421cm" svg:y="3.81cm">
          <draw:image xlink:href="Pictures/1000000100000202000001BD296B9A32.png" xlink:type="simple" xlink:show="embed" xlink:actuate="onLoad" draw:mime-type="image/png">
            <text:p/>
          </draw:image>
        </draw:frame>
        <presentation:notes draw:style-name="dp3">
          <draw:frame draw:name="Google Shape;98;p3:notes 2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2" draw:style-name="gr2" draw:layer="layout" svg:width="15.239cm" svg:height="8.572cm" svg:x="1.905cm" svg:y="3.175cm" draw:page-number="4" presentation:class="page"/>
        </presentation:notes>
      </draw:page>
      <draw:page draw:name="page5" draw:style-name="dp1" draw:master-page-name="OBJECT" presentation:presentation-page-layout-name="AL2T11">
        <office:forms form:automatic-focus="false" form:apply-design-mode="false"/>
        <draw:frame draw:name="Google Shape;101;p 3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Решение</text:span></text:p>
          </draw:text-box>
        </draw:frame>
        <draw:frame draw:name="Google Shape;102;p 3" presentation:style-name="pr12" draw:text-style-name="P14" draw:layer="layout" svg:width="30.692cm" svg:height="6.359cm" svg:x="2.328cm" svg:y="5.071cm" presentation:class="outline" presentation:user-transformed="true">
          <draw:text-box>
            <text:p text:style-name="P16"><text:span text:style-name="T7">Глобальный вторичный индекс (ГВИ) - </text:span><text:span text:style-name="T7">индексная структура с сегментацией данных, </text:span><text:span text:style-name="T7">отличной от сегментации индексируемой </text:span><text:span text:style-name="T7">таблицы.</text:span></text:p>
            <text:p text:style-name="P16"><text:span text:style-name="T7">Такая структура позволяет максимально </text:span><text:span text:style-name="T7">оптимизировать поиск по вторичным ключам </text:span><text:span text:style-name="T7">высокой кардинальности. В иных случаях он </text:span><text:span text:style-name="T7">практически не уступает ЛВИ.</text:span></text:p>
            <text:p text:style-name="P16"><text:span text:style-name="T7">Недостаток: обновление записи происходит с </text:span><text:span text:style-name="T7">двумя дополнительными сетевыми запросами.</text:span></text:p>
          </draw:text-box>
        </draw:frame>
        <draw:frame draw:style-name="gr3" draw:text-style-name="P15" draw:layer="layout" svg:width="18.433cm" svg:height="8.255cm" svg:x="7.62cm" svg:y="10.495cm">
          <draw:image xlink:href="Pictures/1001DF010000436300001E2E77AB52C0.pdf" xlink:type="simple" xlink:show="embed" xlink:actuate="onLoad" draw:mime-type="application/pdf" loext:page-number="0">
            <text:p/>
          </draw:image>
          <draw:image xlink:href="Pictures/100000010000028C000001247F0DA8A3.png" xlink:type="simple" xlink:show="embed" xlink:actuate="onLoad" draw:mime-type="image/png"/>
        </draw:frame>
        <presentation:notes draw:style-name="dp3">
          <draw:frame draw:name="Google Shape;98;p3:notes 3" presentation:style-name="pr1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3" draw:style-name="gr2" draw:layer="layout" svg:width="15.239cm" svg:height="8.572cm" svg:x="1.905cm" svg:y="3.175cm" draw:page-number="5" presentation:class="page"/>
        </presentation:notes>
      </draw:page>
      <draw:page draw:name="page6" draw:style-name="dp1" draw:master-page-name="OBJECT" presentation:presentation-page-layout-name="AL2T11">
        <office:forms form:automatic-focus="false" form:apply-design-mode="false"/>
        <draw:frame draw:name="Google Shape;101;p 4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Цель</text:span></text:p>
          </draw:text-box>
        </draw:frame>
        <draw:frame draw:name="Google Shape;102;p 4" presentation:style-name="pr14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Дать заказчикам возможность выбора </text:span><text:span text:style-name="T7">индексной структуры, подходящей под </text:span><text:span text:style-name="T7">их нужды.</text:span></text:p>
            <text:p text:style-name="P16"><text:span text:style-name="T7">Выбор зависит от множества </text:span><text:span text:style-name="T7">параметров:</text:span></text:p>
            <text:p text:style-name="P16"><text:span text:style-name="T7">- размер кластера,</text:span></text:p>
            <text:p text:style-name="P16"><text:span text:style-name="T7">- нагрузка на кластер, ее вид,</text:span></text:p>
            <text:p text:style-name="P16"><text:span text:style-name="T7">- скорость сети между узлами,</text:span></text:p>
            <text:p text:style-name="P16"><text:span text:style-name="T7">- ...</text:span></text:p>
            <text:p text:style-name="P16"><text:span text:style-name="T7">Необходимо создать способ расчета </text:span><text:span text:style-name="T7">эффективности индексов по этим </text:span><text:span text:style-name="T7">параметрам. </text:span></text:p>
          </draw:text-box>
        </draw:frame>
        <presentation:notes draw:style-name="dp3">
          <draw:frame draw:name="Google Shape;98;p3:notes 4" presentation:style-name="pr1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4" draw:style-name="gr2" draw:layer="layout" svg:width="15.239cm" svg:height="8.572cm" svg:x="1.905cm" svg:y="3.175cm" draw:page-number="6" presentation:class="page"/>
        </presentation:notes>
      </draw:page>
      <draw:page draw:name="page7" draw:style-name="dp1" draw:master-page-name="OBJECT" presentation:presentation-page-layout-name="AL2T11">
        <office:forms form:automatic-focus="false" form:apply-design-mode="false"/>
        <draw:frame draw:name="Google Shape;101;p 5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Задачи</text:span></text:p>
          </draw:text-box>
        </draw:frame>
        <draw:frame draw:name="Google Shape;102;p 5" presentation:style-name="pr16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1. Составить математическую модель обеих индексных структур.</text:span></text:p>
            <text:p text:style-name="P16"><text:span text:style-name="T7">2. Разработать плагин ГВИ для СУБД Picodata.</text:span></text:p>
            <text:p text:style-name="P16"><text:span text:style-name="T7">3. Проверить точность математической модели с помощью множества натурных экспериментов малого масштаба.</text:span></text:p>
            <text:p text:style-name="P16"><text:span text:style-name="T7">4. С помощью модели найти параметры, при которых каждая индексная структура показывает себя лучше другой и составить справочные материалы по их использованию.</text:span></text:p>
          </draw:text-box>
        </draw:frame>
        <presentation:notes draw:style-name="dp3">
          <draw:frame draw:name="Google Shape;98;p3:notes 5" presentation:style-name="pr1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5" draw:style-name="gr2" draw:layer="layout" svg:width="15.239cm" svg:height="8.572cm" svg:x="1.905cm" svg:y="3.175cm" draw:page-number="7" presentation:class="page"/>
        </presentation:notes>
      </draw:page>
      <draw:page draw:name="page8" draw:style-name="dp1" draw:master-page-name="OBJECT" presentation:presentation-page-layout-name="AL2T11">
        <office:forms form:automatic-focus="false" form:apply-design-mode="false"/>
        <draw:frame draw:style-name="gr4" draw:text-style-name="P6" draw:layer="layout" svg:width="5.08cm" svg:height="5.08cm" svg:x="19.05cm" svg:y="10.16cm">
          <draw:image xlink:href="Pictures/10000000000002580000025828CED5F2.png" xlink:type="simple" xlink:show="embed" xlink:actuate="onLoad" draw:mime-type="image/png">
            <text:p/>
          </draw:image>
        </draw:frame>
        <draw:frame draw:name="Google Shape;101;p 6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Сравнение с аналогами</text:span></text:p>
          </draw:text-box>
        </draw:frame>
        <draw:frame draw:name="Google Shape;102;p 6" presentation:style-name="pr18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Глобальный вторичный индекс – не новая идея, например, она реализована в следующих СУБД: DynamoDB, Couchbase, ScyllaDB, ...</text:span></text:p>
            <text:p text:style-name="P16"><text:span text:style-name="T7">Однако интерес представляет именно математическая модель, так как аналога ей нет, а натурные эксперименты очень затратны.</text:span></text:p>
          </draw:text-box>
        </draw:frame>
        <draw:frame draw:style-name="gr4" draw:text-style-name="P6" draw:layer="layout" svg:width="8.46cm" svg:height="6.35cm" svg:x="18.615cm" svg:y="3.81cm">
          <draw:image xlink:href="Pictures/10000000000003620000028AAF43F2CB.jpg" xlink:type="simple" xlink:show="embed" xlink:actuate="onLoad" draw:mime-type="image/jpeg">
            <text:p/>
          </draw:image>
        </draw:frame>
        <draw:frame draw:style-name="gr4" draw:text-style-name="P6" draw:layer="layout" svg:width="4.732cm" svg:height="4.732cm" svg:x="26.035cm" svg:y="7.033cm">
          <draw:image xlink:href="Pictures/1000000100000500000005009E8D18F3.png" xlink:type="simple" xlink:show="embed" xlink:actuate="onLoad" draw:mime-type="image/png">
            <text:p/>
          </draw:image>
        </draw:frame>
        <draw:frame draw:style-name="gr4" draw:text-style-name="P6" draw:layer="layout" svg:width="5.519cm" svg:height="4.958cm" svg:x="24.23cm" svg:y="12.287cm">
          <draw:image xlink:href="Pictures/10000001000004B000000436C2E9BAD7.png" xlink:type="simple" xlink:show="embed" xlink:actuate="onLoad" draw:mime-type="image/png">
            <text:p/>
          </draw:image>
        </draw:frame>
        <presentation:notes draw:style-name="dp3">
          <draw:frame draw:name="Google Shape;98;p3:notes 6" presentation:style-name="pr1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6" draw:style-name="gr2" draw:layer="layout" svg:width="15.239cm" svg:height="8.572cm" svg:x="1.905cm" svg:y="3.175cm" draw:page-number="8" presentation:class="page"/>
        </presentation:notes>
      </draw:page>
      <draw:page draw:name="Дизайн исследования" draw:style-name="dp1" draw:master-page-name="OBJECT" presentation:presentation-page-layout-name="AL2T11">
        <office:forms form:automatic-focus="false" form:apply-design-mode="false"/>
        <draw:frame draw:name="Google Shape;107;p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атематическая модель</text:span></text:p>
          </draw:text-box>
        </draw:frame>
        <draw:frame draw:name="Google Shape;102;p 7" presentation:style-name="pr20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СУБД моделируется как N СМО M/G/1, где N - количество наборов реплик в кластере.</text:span></text:p>
            <text:p text:style-name="P16"><text:span text:style-name="T7">В модели учитывается время работы узла и передача результатов по сети.</text:span></text:p>
            <text:p text:style-name="P16"><text:span text:style-name="T7">Предполагается равномерное распределение данных в кластере.</text:span></text:p>
            <text:p text:style-name="P16"><text:span text:style-name="T7"/></text:p>
          </draw:text-box>
        </draw:frame>
        <draw:frame draw:style-name="gr3" draw:text-style-name="P15" draw:layer="layout" svg:width="10.786cm" svg:height="1.575cm" svg:x="20.229cm" svg:y="4.575cm">
          <draw:image xlink:href="Pictures/100000010000050E000000BD61010406.png" xlink:type="simple" xlink:show="embed" xlink:actuate="onLoad" draw:mime-type="image/png">
            <text:p/>
          </draw:image>
        </draw:frame>
        <draw:frame draw:style-name="gr3" draw:text-style-name="P15" draw:layer="layout" svg:width="11.43cm" svg:height="3.273cm" svg:x="19.785cm" svg:y="11.095cm">
          <draw:image xlink:href="Pictures/1000000100000323000000E6AC7E3D99.png" xlink:type="simple" xlink:show="embed" xlink:actuate="onLoad" draw:mime-type="image/png">
            <text:p/>
          </draw:image>
        </draw:frame>
        <draw:frame draw:style-name="gr3" draw:text-style-name="P15" draw:layer="layout" svg:width="10.282cm" svg:height="2.809cm" svg:x="20.42cm" svg:y="7.185cm">
          <draw:image xlink:href="Pictures/100000010000029A000000B69B10E1CC.png" xlink:type="simple" xlink:show="embed" xlink:actuate="onLoad" draw:mime-type="image/png">
            <text:p/>
          </draw:image>
        </draw:frame>
        <draw:frame draw:style-name="gr3" draw:text-style-name="P15" draw:layer="layout" svg:width="9.055cm" svg:height="1.66cm" svg:x="20.925cm" svg:y="15.54cm">
          <draw:image xlink:href="Pictures/100000010000031C000000920F1559BB.png" xlink:type="simple" xlink:show="embed" xlink:actuate="onLoad" draw:mime-type="image/png">
            <text:p/>
          </draw:image>
        </draw:frame>
        <presentation:notes draw:style-name="dp2">
          <draw:frame draw:name="Google Shape;104;p4:notes" presentation:style-name="pr2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" draw:style-name="gr2" draw:layer="layout" svg:width="15.239cm" svg:height="8.572cm" svg:x="1.905cm" svg:y="3.175cm" draw:page-number="9" presentation:class="page"/>
        </presentation:notes>
      </draw:page>
      <draw:page draw:name="page10" draw:style-name="dp1" draw:master-page-name="OBJECT" presentation:presentation-page-layout-name="AL2T11">
        <office:forms form:automatic-focus="false" form:apply-design-mode="false"/>
        <draw:frame draw:name="Google Shape;107;p 3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Параметры модели</text:span></text:p>
          </draw:text-box>
        </draw:frame>
        <draw:frame draw:name="Google Shape;102;p 11" presentation:style-name="pr22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Пользователям модели предлагается самим рассчитать показатели, актуальные для их сервиса и кластера СУБД.</text:span></text:p>
            <text:p text:style-name="P16"><text:span text:style-name="T7">Предоставлены ориентировочные значения каждого параметра для удобства моделирования.</text:span></text:p>
          </draw:text-box>
        </draw:frame>
        <presentation:notes draw:style-name="dp3">
          <draw:frame draw:name="Google Shape;104;p4:notes 3" presentation:style-name="pr2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3" draw:style-name="gr2" draw:layer="layout" svg:width="15.239cm" svg:height="8.572cm" svg:x="1.905cm" svg:y="3.175cm" draw:page-number="10" presentation:class="page"/>
        </presentation:notes>
      </draw:page>
      <draw:page draw:name="page11" draw:style-name="dp1" draw:master-page-name="OBJECT" presentation:presentation-page-layout-name="AL2T11">
        <office:forms form:automatic-focus="false" form:apply-design-mode="false"/>
        <draw:frame draw:name="Google Shape;107;p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Показатели эффективности</text:span></text:p>
          </draw:text-box>
        </draw:frame>
        <draw:frame draw:name="Google Shape;102;p 8" presentation:style-name="pr24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В качестве результата, модель возвращает значения четырех показателей эффективности:</text:span></text:p>
            <text:p text:style-name="P16"><text:span text:style-name="T7">- максимальная нагрузка на кластер</text:span></text:p>
            <text:p text:style-name="P16"><text:span text:style-name="T7">- вероятность необслуживания запроса ввиду таймаута</text:span></text:p>
            <text:p text:style-name="P16"><text:span text:style-name="T8">- среднее время ожидания </text:span><text:span text:style-name="T7">пользователем ответа от СУБД</text:span></text:p>
            <text:p text:style-name="P16"><text:span text:style-name="T7">- среднее время нахождения заявки в очереди</text:span></text:p>
          </draw:text-box>
        </draw:frame>
        <draw:frame draw:style-name="gr3" draw:text-style-name="P15" draw:layer="layout" svg:width="13.792cm" svg:height="7.602cm" svg:x="19.05cm" svg:y="4.463cm">
          <draw:image xlink:href="Pictures/1000000000000379000001EA6DF73825.png" xlink:type="simple" xlink:show="embed" xlink:actuate="onLoad" draw:mime-type="image/png">
            <text:p/>
          </draw:image>
        </draw:frame>
        <draw:frame draw:style-name="gr3" draw:text-style-name="P15" draw:layer="layout" svg:width="9.05cm" svg:height="4.098cm" svg:x="21.59cm" svg:y="13.335cm">
          <draw:image xlink:href="Pictures/100000010000019D000000BB5FE70595.png" xlink:type="simple" xlink:show="embed" xlink:actuate="onLoad" draw:mime-type="image/png">
            <text:p/>
          </draw:image>
        </draw:frame>
        <presentation:notes draw:style-name="dp3">
          <draw:frame draw:name="Google Shape;104;p4:notes 1" presentation:style-name="pr2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1" draw:style-name="gr2" draw:layer="layout" svg:width="15.239cm" svg:height="8.572cm" svg:x="1.905cm" svg:y="3.175cm" draw:page-number="11" presentation:class="page"/>
        </presentation:notes>
      </draw:page>
      <draw:page draw:name="page12" draw:style-name="dp1" draw:master-page-name="OBJECT" presentation:presentation-page-layout-name="AL2T11">
        <office:forms form:automatic-focus="false" form:apply-design-mode="false"/>
        <draw:frame draw:name="Google Shape;107;p 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Глобальный вторичный индекс</text:span></text:p>
          </draw:text-box>
        </draw:frame>
        <draw:frame draw:name="Google Shape;102;p 12" presentation:style-name="pr26" draw:text-style-name="P14" draw:layer="layout" svg:width="30.056cm" svg:height="2.552cm" svg:x="2.329cm" svg:y="14.605cm" presentation:class="outline" presentation:user-transformed="true">
          <draw:text-box>
            <text:p text:style-name="P16"><text:span text:style-name="T7">Реализован в виде плагина к СУБД Picodata на Rust.</text:span></text:p>
            <text:p text:style-name="P16"><text:span text:style-name="T7">Доступ к взаимодействию пока только через HTTP-запросы, в будущем планируется встроить в планировщик SQL СУБД.</text:span></text:p>
            <text:p text:style-name="P16"><text:span text:style-name="T7"/></text:p>
          </draw:text-box>
        </draw:frame>
        <draw:frame draw:style-name="gr3" draw:text-style-name="P15" draw:layer="layout" svg:width="18.415cm" svg:height="10.75cm" svg:x="7.62cm" svg:y="3.855cm">
          <draw:image xlink:href="Pictures/1001D4FD00004C7B00002CA62F721754.pdf" xlink:type="simple" xlink:show="embed" xlink:actuate="onLoad" draw:mime-type="application/pdf" loext:page-number="0">
            <text:p/>
          </draw:image>
          <draw:image xlink:href="Pictures/10000001000002E4000001B0EE0BE758.png" xlink:type="simple" xlink:show="embed" xlink:actuate="onLoad" draw:mime-type="image/png"/>
        </draw:frame>
        <presentation:notes draw:style-name="dp3">
          <draw:frame draw:name="Google Shape;104;p4:notes 4" presentation:style-name="pr2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4" draw:style-name="gr2" draw:layer="layout" svg:width="15.239cm" svg:height="8.572cm" svg:x="1.905cm" svg:y="3.175cm" draw:page-number="12" presentation:class="page"/>
        </presentation:notes>
      </draw:page>
      <draw:page draw:name="page13" draw:style-name="dp1" draw:master-page-name="OBJECT" presentation:presentation-page-layout-name="AL2T11">
        <office:forms form:automatic-focus="false" form:apply-design-mode="false"/>
        <draw:frame draw:name="Google Shape;107;p 5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Особенности ГВИ</text:span></text:p>
          </draw:text-box>
        </draw:frame>
        <draw:frame draw:style-name="gr3" draw:text-style-name="P15" draw:layer="layout" svg:width="14.98cm" svg:height="10.995cm" svg:x="18.04cm" svg:y="5.08cm">
          <draw:image xlink:href="Pictures/1001BEE000003E8700002DE4EE26A3AA.pdf" xlink:type="simple" xlink:show="embed" xlink:actuate="onLoad" draw:mime-type="application/pdf" loext:page-number="0">
            <text:p/>
          </draw:image>
          <draw:image xlink:href="Pictures/100000010000025D000001BC0A3D64AE.png" xlink:type="simple" xlink:show="embed" xlink:actuate="onLoad" draw:mime-type="image/png"/>
        </draw:frame>
        <draw:frame draw:style-name="gr5" draw:text-style-name="P17" draw:layer="layout" svg:width="16.906cm" svg:height="10.795cm" svg:x="0.635cm" svg:y="5.08cm">
          <draw:image xlink:href="Pictures/1001CB7F000044A000002BD2FB357736.pdf" xlink:type="simple" xlink:show="embed" xlink:actuate="onLoad" draw:mime-type="application/pdf" loext:page-number="0">
            <text:p/>
          </draw:image>
          <draw:image xlink:href="Pictures/1000000100000298000001A8F6148938.png" xlink:type="simple" xlink:show="embed" xlink:actuate="onLoad" draw:mime-type="image/png"/>
        </draw:frame>
        <presentation:notes draw:style-name="dp3">
          <draw:frame draw:name="Google Shape;104;p4:notes 5" presentation:style-name="pr2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5" draw:style-name="gr2" draw:layer="layout" svg:width="15.239cm" svg:height="8.572cm" svg:x="1.905cm" svg:y="3.175cm" draw:page-number="13" presentation:class="page"/>
        </presentation:notes>
      </draw:page>
      <draw:page draw:name="page14" draw:style-name="dp1" draw:master-page-name="OBJECT" presentation:presentation-page-layout-name="AL2T11">
        <office:forms form:automatic-focus="false" form:apply-design-mode="false"/>
        <draw:frame draw:name="Google Shape;107;p 2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name="Google Shape;102;p 9" presentation:style-name="pr29" draw:text-style-name="P14" draw:layer="layout" svg:width="25.611cm" svg:height="8.264cm" svg:x="2.329cm" svg:y="5.071cm" presentation:class="outline" presentation:user-transformed="true">
          <draw:text-box>
            <text:p text:style-name="P16"><text:span text:style-name="T7">Были проведены эксперименты на кластерах со следующими параметрами:</text:span></text:p>
            <text:p text:style-name="P16"><text:span text:style-name="T7">- наборов реплик: 5, 25, 125,</text:span></text:p>
            <text:p text:style-name="P16"><text:span text:style-name="T7">- кардинальность данных: 100k, 10m, 1b,</text:span></text:p>
            <text:p text:style-name="P16"><text:span text:style-name="T7">- кардинальность вторичных ключей: 1:1, 100:1, 10k:1,</text:span></text:p>
            <text:p text:style-name="P16"><text:span text:style-name="T7">- среднее время задержки между узлами: 10мс.</text:span></text:p>
          </draw:text-box>
        </draw:frame>
        <presentation:notes draw:style-name="dp3">
          <draw:frame draw:name="Google Shape;104;p4:notes 2" presentation:style-name="pr3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2" draw:style-name="gr2" draw:layer="layout" svg:width="15.239cm" svg:height="8.572cm" svg:x="1.905cm" svg:y="3.175cm" draw:page-number="14" presentation:class="page"/>
        </presentation:notes>
      </draw:page>
      <draw:page draw:name="page15" draw:style-name="dp1" draw:master-page-name="OBJECT" presentation:presentation-page-layout-name="AL2T11">
        <office:forms form:automatic-focus="false" form:apply-design-mode="false"/>
        <draw:frame draw:name="Google Shape;107;p 7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style-name="gr3" draw:text-style-name="P15" draw:layer="layout" svg:width="15.054cm" svg:height="9.032cm" svg:x="17.331cm" svg:y="4.303cm">
          <draw:image xlink:href="Pictures/10000000000004B0000002D0946A218E.png" xlink:type="simple" xlink:show="embed" xlink:actuate="onLoad" draw:mime-type="image/png">
            <text:p/>
          </draw:image>
        </draw:frame>
        <draw:frame draw:style-name="gr3" draw:text-style-name="P15" draw:layer="layout" svg:width="10.633cm" svg:height="5.366cm" svg:x="19.685cm" svg:y="13.335cm">
          <draw:image xlink:href="Pictures/10000001000001AA000000D78E8F3CE7.png" xlink:type="simple" xlink:show="embed" xlink:actuate="onLoad" draw:mime-type="image/png">
            <text:p/>
          </draw:image>
        </draw:frame>
        <draw:frame draw:style-name="gr3" draw:text-style-name="P15" draw:layer="layout" svg:width="15.9cm" svg:height="8.764cm" svg:x="0.635cm" svg:y="4.795cm">
          <draw:image xlink:href="Pictures/1000000000000379000001EA277BB3BF.png" xlink:type="simple" xlink:show="embed" xlink:actuate="onLoad" draw:mime-type="image/png">
            <text:p/>
          </draw:image>
        </draw:frame>
        <draw:frame draw:style-name="gr3" draw:text-style-name="P15" draw:layer="layout" svg:width="10.795cm" svg:height="4.708cm" svg:x="3.175cm" svg:y="13.97cm">
          <draw:image xlink:href="Pictures/10000001000001AF000000BCC923A9D4.png" xlink:type="simple" xlink:show="embed" xlink:actuate="onLoad" draw:mime-type="image/png">
            <text:p/>
          </draw:image>
        </draw:frame>
        <presentation:notes draw:style-name="dp3">
          <draw:frame draw:name="Google Shape;104;p4:notes 7" presentation:style-name="pr3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7" draw:style-name="gr2" draw:layer="layout" svg:width="15.239cm" svg:height="8.572cm" svg:x="1.905cm" svg:y="3.175cm" draw:page-number="15" presentation:class="page"/>
        </presentation:notes>
      </draw:page>
      <draw:page draw:name="page16" draw:style-name="dp1" draw:master-page-name="OBJECT" presentation:presentation-page-layout-name="AL2T11">
        <office:forms form:automatic-focus="false" form:apply-design-mode="false"/>
        <draw:frame draw:style-name="gr3" draw:text-style-name="P15" draw:layer="layout" svg:width="15.266cm" svg:height="9.159cm" svg:x="17.119cm" svg:y="4.445cm">
          <draw:image xlink:href="Pictures/10000000000004B0000002D0E860049D.png" xlink:type="simple" xlink:show="embed" xlink:actuate="onLoad" draw:mime-type="image/png">
            <text:p/>
          </draw:image>
        </draw:frame>
        <draw:frame draw:name="Google Shape;107;p 8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style-name="gr3" draw:text-style-name="P15" draw:layer="layout" svg:width="11.348cm" svg:height="4.734cm" svg:x="19.232cm" svg:y="13.604cm">
          <draw:image xlink:href="Pictures/10000001000001AD000000B3D5D08F3D.png" xlink:type="simple" xlink:show="embed" xlink:actuate="onLoad" draw:mime-type="image/png">
            <text:p/>
          </draw:image>
        </draw:frame>
        <draw:frame draw:style-name="gr3" draw:text-style-name="P15" draw:layer="layout" svg:width="15.675cm" svg:height="8.64cm" svg:x="1.139cm" svg:y="4.895cm">
          <draw:image xlink:href="Pictures/1000000000000379000001EABE1F2EDF.png" xlink:type="simple" xlink:show="embed" xlink:actuate="onLoad" draw:mime-type="image/png">
            <text:p/>
          </draw:image>
        </draw:frame>
        <draw:frame draw:style-name="gr3" draw:text-style-name="P15" draw:layer="layout" svg:width="11.083cm" svg:height="4.946cm" svg:x="3.522cm" svg:y="13.87cm">
          <draw:image xlink:href="Pictures/10000001000001A3000000BB005E66A8.png" xlink:type="simple" xlink:show="embed" xlink:actuate="onLoad" draw:mime-type="image/png">
            <text:p/>
          </draw:image>
        </draw:frame>
        <presentation:notes draw:style-name="dp3">
          <draw:frame draw:name="Google Shape;104;p4:notes 8" presentation:style-name="pr3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8" draw:style-name="gr2" draw:layer="layout" svg:width="15.239cm" svg:height="8.572cm" svg:x="1.905cm" svg:y="3.175cm" draw:page-number="16" presentation:class="page"/>
        </presentation:notes>
      </draw:page>
      <draw:page draw:name="page17" draw:style-name="dp1" draw:master-page-name="OBJECT" presentation:presentation-page-layout-name="AL2T11">
        <office:forms form:automatic-focus="false" form:apply-design-mode="false"/>
        <draw:frame draw:name="Google Shape;102;p 15" presentation:style-name="pr33" draw:text-style-name="P14" draw:layer="layout" svg:width="21.8cm" svg:height="12.086cm" svg:x="2.33cm" svg:y="5.071cm" presentation:class="outline" presentation:user-transformed="true">
          <draw:text-box>
            <text:p text:style-name="P16"><text:span text:style-name="T7">Расчет на кластере со следующими параметрами:</text:span></text:p>
            <text:p text:style-name="P16"><text:span text:style-name="T7">- наборов реплик: 1000,</text:span></text:p>
            <text:p text:style-name="P16"><text:span text:style-name="T7">- кардинальность данных: 1b,</text:span></text:p>
            <text:p text:style-name="P16"><text:span text:style-name="T7">- кардинальность вторичных ключей: 10:1,</text:span></text:p>
            <text:p text:style-name="P16"><text:span text:style-name="T7">- среднее время задержки между узлами: 10мс.</text:span></text:p>
          </draw:text-box>
        </draw:frame>
        <draw:frame draw:name="Google Shape;107;p 6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одель большого кластера</text:span></text:p>
          </draw:text-box>
        </draw:frame>
        <presentation:notes draw:style-name="dp3">
          <draw:frame draw:name="Google Shape;104;p4:notes 6" presentation:style-name="pr3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6" draw:style-name="gr2" draw:layer="layout" svg:width="15.239cm" svg:height="8.572cm" svg:x="1.905cm" svg:y="3.175cm" draw:page-number="17" presentation:class="page"/>
        </presentation:notes>
      </draw:page>
      <draw:page draw:name="page18" draw:style-name="dp1" draw:master-page-name="OBJECT" presentation:presentation-page-layout-name="AL2T11">
        <office:forms form:automatic-focus="false" form:apply-design-mode="false"/>
        <draw:frame draw:name="Google Shape;107;p 9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одель большого кластера</text:span></text:p>
          </draw:text-box>
        </draw:frame>
        <draw:frame draw:style-name="gr3" draw:text-style-name="P15" draw:layer="layout" svg:width="14.605cm" svg:height="8.05cm" svg:x="1.905cm" svg:y="4.015cm">
          <draw:image xlink:href="Pictures/1000000000000379000001EAB7A98B09.png" xlink:type="simple" xlink:show="embed" xlink:actuate="onLoad" draw:mime-type="image/png">
            <text:p/>
          </draw:image>
        </draw:frame>
        <draw:frame draw:style-name="gr3" draw:text-style-name="P15" draw:layer="layout" svg:width="14.909cm" svg:height="8.218cm" svg:x="17.58cm" svg:y="3.945cm">
          <draw:image xlink:href="Pictures/1000000000000379000001EA0DEAE6BB.png" xlink:type="simple" xlink:show="embed" xlink:actuate="onLoad" draw:mime-type="image/png">
            <text:p/>
          </draw:image>
        </draw:frame>
        <draw:frame draw:style-name="gr3" draw:text-style-name="P15" draw:layer="layout" svg:width="10.554cm" svg:height="4.972cm" svg:x="4.051cm" svg:y="12.808cm">
          <draw:image xlink:href="Pictures/100000010000018F000000BC368AAC44.png" xlink:type="simple" xlink:show="embed" xlink:actuate="onLoad" draw:mime-type="image/png">
            <text:p/>
          </draw:image>
        </draw:frame>
        <draw:frame draw:style-name="gr3" draw:text-style-name="P15" draw:layer="layout" svg:width="11.03cm" svg:height="5.078cm" svg:x="19.685cm" svg:y="12.702cm">
          <draw:image xlink:href="Pictures/10000001000001A1000000C0911E141B.png" xlink:type="simple" xlink:show="embed" xlink:actuate="onLoad" draw:mime-type="image/png">
            <text:p/>
          </draw:image>
        </draw:frame>
        <presentation:notes draw:style-name="dp3">
          <draw:frame draw:name="Google Shape;104;p4:notes 9" presentation:style-name="pr3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9" draw:style-name="gr2" draw:layer="layout" svg:width="15.239cm" svg:height="8.572cm" svg:x="1.905cm" svg:y="3.175cm" draw:page-number="18" presentation:class="page"/>
        </presentation:notes>
      </draw:page>
      <draw:page draw:name="Результаты 2 (при необходимости)" draw:style-name="dp1" draw:master-page-name="OBJECT" presentation:presentation-page-layout-name="AL2T11">
        <office:forms form:automatic-focus="false" form:apply-design-mode="false"/>
        <draw:frame draw:name="Google Shape;119;p6" presentation:style-name="pr5" draw:text-style-name="P18" draw:layer="layout" svg:width="29.209cm" svg:height="3.681cm" svg:x="2.328cm" svg:y="1.014cm" presentation:class="title" presentation:user-transformed="true">
          <draw:text-box>
            <text:p text:style-name="P11"><text:span text:style-name="T9">Результаты</text:span></text:p>
          </draw:text-box>
        </draw:frame>
        <draw:frame draw:style-name="gr6" draw:text-style-name="P19" draw:layer="layout" svg:width="0.502cm" svg:height="1.187cm" svg:x="16.632cm" svg:y="9.126cm">
          <draw:text-box>
            <text:p/>
          </draw:text-box>
        </draw:frame>
        <draw:frame draw:style-name="gr3" draw:text-style-name="P17" draw:layer="layout" svg:width="10.161cm" svg:height="10.118cm" svg:x="20.319cm" svg:y="4.695cm">
          <draw:image xlink:href="Pictures/10000001000002BD000002BABBE7205A.png" xlink:type="simple" xlink:show="embed" xlink:actuate="onLoad" draw:mime-type="image/png">
            <text:p/>
          </draw:image>
        </draw:frame>
        <draw:frame draw:name="Google Shape;102;p 10" presentation:style-name="pr36" draw:text-style-name="P14" draw:layer="layout" svg:width="16.087cm" svg:height="12.086cm" svg:x="2.33cm" svg:y="5.071cm" presentation:class="outline" presentation:user-transformed="true">
          <draw:text-box>
            <text:p text:style-name="P16"><text:span text:style-name="T7">Математическая модель довольно точно приближенно вычисляет показатели эффективности на небольших кластерах.</text:span></text:p>
            <text:p text:style-name="P16"><text:span text:style-name="T7">Разработан плагин глобальных вторичных индексов для СУБД Picodata</text:span></text:p>
          </draw:text-box>
        </draw:frame>
        <presentation:notes draw:style-name="dp2">
          <draw:frame draw:name="Google Shape;116;p6:notes" presentation:style-name="pr3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" draw:style-name="gr2" draw:layer="layout" svg:width="15.239cm" svg:height="8.572cm" svg:x="1.905cm" svg:y="3.175cm" draw:page-number="19" presentation:class="page"/>
        </presentation:notes>
      </draw:page>
      <draw:page draw:name="page20" draw:style-name="dp1" draw:master-page-name="OBJECT" presentation:presentation-page-layout-name="AL2T11">
        <office:forms form:automatic-focus="false" form:apply-design-mode="false"/>
        <draw:frame draw:name="Google Shape;119;p 1" presentation:style-name="pr5" draw:text-style-name="P18" draw:layer="layout" svg:width="29.209cm" svg:height="3.681cm" svg:x="2.328cm" svg:y="1.014cm" presentation:class="title" presentation:user-transformed="true">
          <draw:text-box>
            <text:p text:style-name="P11"><text:span text:style-name="T9">Развитие работы</text:span></text:p>
          </draw:text-box>
        </draw:frame>
        <draw:frame draw:style-name="gr6" draw:text-style-name="P19" draw:layer="layout" svg:width="0.502cm" svg:height="1.187cm" svg:x="16.632cm" svg:y="9.126cm">
          <draw:text-box>
            <text:p/>
          </draw:text-box>
        </draw:frame>
        <draw:frame draw:name="Google Shape;102;p 13" presentation:style-name="pr38" draw:text-style-name="P14" draw:layer="layout" svg:width="14.18cm" svg:height="12.086cm" svg:x="2.33cm" svg:y="5.071cm" presentation:class="outline" presentation:user-transformed="true">
          <draw:text-box>
            <text:p text:style-name="P16"><text:span text:style-name="T7">Для повышения точности модели:</text:span></text:p>
            <text:p text:style-name="P16"><text:span text:style-name="T7">- рассмотреть вероятностную модель B+*-дерева</text:span></text:p>
            <text:p text:style-name="P16"><text:span text:style-name="T7">- рассмотреть случаи с “горячими” ключами</text:span></text:p>
            <text:p text:style-name="P16"><text:span text:style-name="T7">- подробнее изучить что влияет на скорость поиска в индексах</text:span></text:p>
          </draw:text-box>
        </draw:frame>
        <draw:frame draw:style-name="gr3" draw:text-style-name="P15" draw:layer="layout" svg:width="15.653cm" svg:height="7.62cm" svg:x="17.167cm" svg:y="6.35cm">
          <draw:image xlink:href="Pictures/100000010000034600000198A09B8021.png" xlink:type="simple" xlink:show="embed" xlink:actuate="onLoad" draw:mime-type="image/png">
            <text:p/>
          </draw:image>
        </draw:frame>
        <presentation:notes draw:style-name="dp3">
          <draw:frame draw:name="Google Shape;116;p6:notes 1" presentation:style-name="pr3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 1" draw:style-name="gr2" draw:layer="layout" svg:width="15.239cm" svg:height="8.572cm" svg:x="1.905cm" svg:y="3.175cm" draw:page-number="20" presentation:class="page"/>
        </presentation:notes>
      </draw:page>
      <draw:page draw:name="Выводы" draw:style-name="dp1" draw:master-page-name="OBJECT" presentation:presentation-page-layout-name="AL2T11">
        <office:forms form:automatic-focus="false" form:apply-design-mode="false"/>
        <draw:frame draw:name="Google Shape;126;p7" presentation:style-name="pr40" draw:text-style-name="P21" draw:layer="layout" svg:width="29.209cm" svg:height="12.086cm" svg:x="2.329cm" svg:y="3.482cm" presentation:class="outline" presentation:user-transformed="true">
          <draw:text-box>
            <text:p text:style-name="P20"><text:span text:style-name="T10">Спасибо за внимание</text:span></text:p>
          </draw:text-box>
        </draw:frame>
        <presentation:notes draw:style-name="dp2">
          <draw:frame draw:name="Google Shape;122;p7:notes" presentation:style-name="pr4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7:notes" draw:style-name="gr2" draw:layer="layout" svg:width="15.239cm" svg:height="8.572cm" svg:x="1.905cm" svg:y="3.175cm" draw:page-number="2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pitch="fixed"/>
    <style:font-face style:name="CaskaydiaMono NF SemiLight1" svg:font-family="'CaskaydiaMono NF SemiLight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.203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.152cm" fo:margin-top="0.4cm" fo:margin-bottom="0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6;p9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7;p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8;p9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9;p9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0;p9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3;p18" presentation:style-name="VERTICAL_5f_TEX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74;p18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75;p18" presentation:style-name="Mpr4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6;p18" presentation:style-name="Mpr4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7;p18" presentation:style-name="Mpr4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9;p19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80;p19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81;p19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82;p19" presentation:style-name="Mpr7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83;p19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2;p10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4;p10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5;p10" presentation:style-name="Mpr10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6;p10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8;p11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9;p11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30;p11" presentation:style-name="Mpr13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1;p11" presentation:style-name="Mpr13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2;p11" presentation:style-name="Mpr13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4;p12" presentation:style-name="TWO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5;p12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36;p12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37;p12" presentation:style-name="Mpr1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8;p12" presentation:style-name="Mpr16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9;p12" presentation:style-name="Mpr16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1;p13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42;p13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43;p13" presentation:style-name="TWO_5f_OBJECTS_5f_WITH_5f_TEXT-outline1" draw:layer="backgroundobjects" svg:width="14.326cm" svg:height="10.234cm" svg:x="2.333cm" svg:y="6.959cm" presentation:class="outline" presentation:placeholder="true" presentation:user-transformed="true">
        <draw:text-box/>
      </draw:frame>
      <draw:frame draw:name="Google Shape;44;p13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5;p13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6;p13" presentation:style-name="Mpr19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7;p13" presentation:style-name="Mpr19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8;p13" presentation:style-name="Mpr19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0;p14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51;p14" presentation:style-name="Mpr2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14" presentation:style-name="Mpr22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14" presentation:style-name="Mpr22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5" presentation:style-name="Mpr2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6;p15" presentation:style-name="Mpr25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7;p15" presentation:style-name="Mpr25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9;p16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0;p16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1;p16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2;p16" presentation:style-name="Mpr28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3;p16" presentation:style-name="Mpr28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4;p16" presentation:style-name="Mpr28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6;p17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7;p17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8;p17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9;p17" presentation:style-name="Mpr3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0;p17" presentation:style-name="Mpr3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1;p17" presentation:style-name="Mpr3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5-08T19:23:42</meta:creation-date>
    <meta:initial-creator>Кондратьев Михаил Дмитриевич</meta:initial-creator>
    <dc:date>2026-05-20T13:21:23.218832849</dc:date>
    <meta:editing-duration>PT7H26M53S</meta:editing-duration>
    <meta:editing-cycles>47</meta:editing-cycles>
    <meta:generator>LibreOffice/25.8.6.2$Linux_X86_64 LibreOffice_project/88069fac6043c7b6e761a49b8d5046c99f4d3400</meta:generator>
    <meta:print-date>2026-05-09T20:31:46.360464980</meta:print-date>
    <meta:printed-by>PDF files</meta:printed-by>
    <meta:document-statistic meta:object-count="248"/>
  </office:meta>
</office:document-meta>
</file>