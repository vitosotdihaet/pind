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198A09B8021.png" manifest:media-type="image/png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000000379000001EA6DF73825.png" manifest:media-type="image/png"/>
  <manifest:file-entry manifest:full-path="Pictures/10000001000002BD000002BABBE7205A.png" manifest:media-type="image/png"/>
  <manifest:file-entry manifest:full-path="Pictures/1001DF010000436300001E2E45721AC0.pdf" manifest:media-type="application/pdf"/>
  <manifest:file-entry manifest:full-path="Pictures/10013F3000002AE400001F02D1F2EC84.pdf" manifest:media-type="application/pdf"/>
  <manifest:file-entry manifest:full-path="Pictures/100000010000031C000000920F1559BB.png" manifest:media-type="image/png"/>
  <manifest:file-entry manifest:full-path="Pictures/1000000000000379000001EAB7A98B09.png" manifest:media-type="image/png"/>
  <manifest:file-entry manifest:full-path="Pictures/100000010000050E000000BD61010406.png" manifest:media-type="image/png"/>
  <manifest:file-entry manifest:full-path="Pictures/100000010000028C000001247F0DA8A3.png" manifest:media-type="image/png"/>
  <manifest:file-entry manifest:full-path="Pictures/100000010000019D000000BB5FE70595.png" manifest:media-type="image/png"/>
  <manifest:file-entry manifest:full-path="Pictures/100000010000027C000001248290F1FA.png" manifest:media-type="image/png"/>
  <manifest:file-entry manifest:full-path="Pictures/100000010000019F0000012CBECBB9C8.png" manifest:media-type="image/png"/>
  <manifest:file-entry manifest:full-path="Pictures/10000001000002E4000001B0EE0BE758.png" manifest:media-type="image/png"/>
  <manifest:file-entry manifest:full-path="Pictures/100000010000029A000000B69B10E1CC.png" manifest:media-type="image/png"/>
  <manifest:file-entry manifest:full-path="Pictures/1001F26A000041BC00001E2EA220541D.pdf" manifest:media-type="application/pdf"/>
  <manifest:file-entry manifest:full-path="Pictures/1001CB7F000044A000002BD2AD1AAC4D.pdf" manifest:media-type="application/pdf"/>
  <manifest:file-entry manifest:full-path="Pictures/1001D4FD00004C7B00002CA6795DCC2F.pdf" manifest:media-type="application/pdf"/>
  <manifest:file-entry manifest:full-path="Pictures/1001BEE000003E8700002DE4B80978D1.pdf" manifest:media-type="application/pdf"/>
  <manifest:file-entry manifest:full-path="Pictures/1000000100000323000000E6AC7E3D99.png" manifest:media-type="image/png"/>
  <manifest:file-entry manifest:full-path="Pictures/1000000000000379000001EA277BB3BF.png" manifest:media-type="image/png"/>
  <manifest:file-entry manifest:full-path="Pictures/100000010000025D000001BC0A3D64AE.png" manifest:media-type="image/png"/>
  <manifest:file-entry manifest:full-path="Pictures/1000000100000298000001A8F6148938.png" manifest:media-type="image/png"/>
  <manifest:file-entry manifest:full-path="Pictures/10000000000004B0000002D0E860049D.png" manifest:media-type="image/png"/>
  <manifest:file-entry manifest:full-path="Pictures/10000000000004B0000002D0946A218E.png" manifest:media-type="image/png"/>
  <manifest:file-entry manifest:full-path="Pictures/1000000000000379000001EA0DEAE6BB.png" manifest:media-type="image/png"/>
  <manifest:file-entry manifest:full-path="Pictures/10000001000001AA000000D78E8F3CE7.png" manifest:media-type="image/png"/>
  <manifest:file-entry manifest:full-path="Pictures/10000001000001AF000000BCC923A9D4.png" manifest:media-type="image/png"/>
  <manifest:file-entry manifest:full-path="Pictures/10000001000001AD000000B3D5D08F3D.png" manifest:media-type="image/png"/>
  <manifest:file-entry manifest:full-path="Pictures/1000000000000379000001EABE1F2EDF.png" manifest:media-type="image/png"/>
  <manifest:file-entry manifest:full-path="Pictures/1000000100000202000001BD296B9A32.png" manifest:media-type="image/png"/>
  <manifest:file-entry manifest:full-path="Pictures/10000001000001A3000000BB005E66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  <style:text-properties style:font-name="CaskaydiaMono NF SemiLight1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9" style:family="paragraph">
      <loext:graphic-properties draw:fill="none"/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1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" fo:font-size="20pt" style:font-size-asian="20pt" style:font-size-complex="20pt"/>
    </style:style>
    <style:style style:name="T7" style:family="text">
      <style:text-properties style:font-name="CaskaydiaMono NF SemiLight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79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едметная область</text:span></text:p>
          </draw:text-box>
        </draw:frame>
        <draw:frame draw:name="Google Shape;102;p 1" presentation:style-name="pr6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Объект работы: индексирование данных в распределенных СУБД</text:span></text:p>
            <text:p text:style-name="P13"><text:span text:style-name="T6">Предмет работы: глобальный вторичный индекс в распределенной СУБД Picodata</text:span></text:p>
          </draw:text-box>
        </draw:frame>
        <presentation:notes draw:style-name="dp3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4" presentation:style-name="pr8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ключам высокой кардинальности ввиду стратегии сегментирования индекса в кластере СУБД Picodata.</text:span></text:p>
            <text:p text:style-name="P13"><text:span text:style-name="T6">Каждый запрос опрашивает весь кластер, что приводит к блокировке исполнения заявок других клиентов на время поиска.</text:span></text:p>
          </draw:text-box>
        </draw:frame>
        <draw:frame draw:style-name="gr3" draw:text-style-name="P15" draw:layer="layout" svg:width="16.827cm" svg:height="7.725cm" svg:x="16.51cm" svg:y="1.9cm">
          <draw:image xlink:href="Pictures/1001F26A000041BC00001E2EA220541D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draw:frame draw:style-name="gr3" draw:text-style-name="P15" draw:layer="layout" svg:width="10.979cm" svg:height="7.937cm" svg:x="19.501cm" svg:y="8.673cm">
          <draw:image xlink:href="Pictures/10013F3000002AE400001F02D1F2EC84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3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ктуальность</text:span></text:p>
          </draw:text-box>
        </draw:frame>
        <draw:frame draw:name="Google Shape;102;p 2" presentation:style-name="pr10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Распределение нагрузки на несколько серверов – необходимость в случае крупных цифровых продуктов.</text:span></text:p>
            <text:p text:style-name="P16"><text:span text:style-name="T7">Вторичные индексы – это важнейший инструмент по обеспечению быстрого поиска в СУБД.</text:span></text:p>
            <text:p text:style-name="P16"><text:span text:style-name="T8">При поиске в локальном вторичном индексе (ЛВИ), количество сетевых запросов растет линейно количеству узлов в кластере. Также растет </text:span><text:span text:style-name="T7">общее потребление ЦПУ.</text:span></text:p>
          </draw:text-box>
        </draw:frame>
        <draw:frame draw:style-name="gr3" draw:text-style-name="P15" draw:layer="layout" svg:width="13.599cm" svg:height="11.773cm" svg:x="19.421cm" svg:y="3.81cm">
          <draw:image xlink:href="Pictures/1000000100000202000001BD296B9A32.png" xlink:type="simple" xlink:show="embed" xlink:actuate="onLoad" draw:mime-type="image/png">
            <text:p/>
          </draw:image>
        </draw:frame>
        <presentation:notes draw:style-name="dp3">
          <draw:frame draw:name="Google Shape;98;p3:not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2" draw:text-style-name="P14" draw:layer="layout" svg:width="13.547cm" svg:height="12.086cm" svg:x="2.328cm" svg:y="5.071cm" presentation:class="outline" presentation:user-transformed="true">
          <draw:text-box>
            <text:p text:style-name="P16"><text:span text:style-name="T7">Глобальный вторичный индекс (ГВИ) - индексная структура с сегментацией данных, отличной от сегментации индексируемой таблицы.</text:span></text:p>
            <text:p text:style-name="P16"><text:span text:style-name="T7">Такая структура позволяет максимально оптимизировать поиск по вторичным ключам высокой кардинальности. В иных случаях он практически не уступает ЛВИ.</text:span></text:p>
            <text:p text:style-name="P16"><text:span text:style-name="T7">Недостаток: обновление записи происходит с двумя дополнительными сетевыми запросами.</text:span></text:p>
          </draw:text-box>
        </draw:frame>
        <draw:frame draw:style-name="gr4" draw:text-style-name="P6" draw:layer="layout" svg:width="17.25cm" svg:height="7.725cm" svg:x="16.075cm" svg:y="6.88cm">
          <draw:image xlink:href="Pictures/1001DF010000436300001E2E45721AC0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3">
          <draw:frame draw:name="Google Shape;98;p3:notes 3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4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Дать заказчикам возможность выбора индексной структуры, подходящей под их нужды.</text:span></text:p>
            <text:p text:style-name="P16"><text:span text:style-name="T7">Выбор зависит от множества параметров:</text:span></text:p>
            <text:p text:style-name="P16"><text:span text:style-name="T7">- размер кластера,</text:span></text:p>
            <text:p text:style-name="P16"><text:span text:style-name="T7">- нагрузка на кластер, ее вид,</text:span></text:p>
            <text:p text:style-name="P16"><text:span text:style-name="T7">- скорость сети между узлами,</text:span></text:p>
            <text:p text:style-name="P16"><text:span text:style-name="T7">- ...</text:span></text:p>
            <text:p text:style-name="P16"><text:span text:style-name="T7">Необходимо создать способ рассчитать эффективность индексов по этим параметрам. </text:span></text:p>
          </draw:text-box>
        </draw:frame>
        <presentation:notes draw:style-name="dp3">
          <draw:frame draw:name="Google Shape;98;p3:notes 4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16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1. Составить математическую модель обеих индексных структур.</text:span></text:p>
            <text:p text:style-name="P16"><text:span text:style-name="T7">2. Разработать плагин ГВИ для СУБД Picodata.</text:span></text:p>
            <text:p text:style-name="P16"><text:span text:style-name="T7">3. Проверить точность математической модели с помощью множества натурных экспериментов малого масштаба.</text:span></text:p>
            <text:p text:style-name="P16"><text:span text:style-name="T7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3">
          <draw:frame draw:name="Google Shape;98;p3:notes 5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2T11"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равнение с аналогами</text:span></text:p>
          </draw:text-box>
        </draw:frame>
        <draw:frame draw:name="Google Shape;102;p 6" presentation:style-name="pr18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presentation:notes draw:style-name="dp3">
          <draw:frame draw:name="Google Shape;98;p3:notes 6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8" presentation:class="page"/>
        </presentation:notes>
      </draw:page>
      <draw:page draw:name="Дизайн исследования" draw:style-name="dp1" draw:master-page-name="OBJECT" presentation:presentation-page-layout-name="AL2T11"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20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СУБД моделируется как N СМО M/G/1, где N - количество наборов реплик в кластере.</text:span></text:p>
            <text:p text:style-name="P16"><text:span text:style-name="T7">В модели учитывается время работы узла и передача результатов по сети.</text:span></text:p>
            <text:p text:style-name="P16"><text:span text:style-name="T7">Предполагается равномерное распределение данных в кластере.</text:span></text:p>
            <text:p text:style-name="P16"><text:span text:style-name="T7"/></text:p>
          </draw:text-box>
        </draw:frame>
        <draw:frame draw:style-name="gr3" draw:text-style-name="P15" draw:layer="layout" svg:width="10.786cm" svg:height="1.575cm" svg:x="20.229cm" svg:y="4.8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3" draw:text-style-name="P15" draw:layer="layout" svg:width="11.43cm" svg:height="3.273cm" svg:x="19.785cm" svg:y="10.9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3" draw:text-style-name="P15" draw:layer="layout" svg:width="10.282cm" svg:height="2.809cm" svg:x="20.42cm" svg:y="7.2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3" draw:text-style-name="P15" draw:layer="layout" svg:width="9.055cm" svg:height="1.66cm" svg:x="20.925cm" svg:y="15.2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2">
          <draw:frame draw:name="Google Shape;104;p4:notes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2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6"><text:span text:style-name="T7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3">
          <draw:frame draw:name="Google Shape;104;p4:notes 3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4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В качестве результата, модель возвращает значения четырех показателей эффективности:</text:span></text:p>
            <text:p text:style-name="P16"><text:span text:style-name="T7">- максимальная нагрузка на кластер</text:span></text:p>
            <text:p text:style-name="P16"><text:span text:style-name="T7">- вероятность необслуживания запроса ввиду таймаута</text:span></text:p>
            <text:p text:style-name="P16"><text:span text:style-name="T8">- среднее время ожидания </text:span><text:span text:style-name="T7">пользователем ответа от СУБД</text:span></text:p>
            <text:p text:style-name="P16"><text:span text:style-name="T7">- среднее время нахождения заявки в очереди</text:span></text:p>
          </draw:text-box>
        </draw:frame>
        <draw:frame draw:style-name="gr3" draw:text-style-name="P15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3" draw:text-style-name="P15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3">
          <draw:frame draw:name="Google Shape;104;p4:notes 1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Глобальный вторичный индекс</text:span></text:p>
          </draw:text-box>
        </draw:frame>
        <draw:frame draw:name="Google Shape;102;p 12" presentation:style-name="pr26" draw:text-style-name="P14" draw:layer="layout" svg:width="30.056cm" svg:height="2.552cm" svg:x="2.329cm" svg:y="14.605cm" presentation:class="outline" presentation:user-transformed="true">
          <draw:text-box>
            <text:p text:style-name="P16"><text:span text:style-name="T7">Реализован в виде плагина к СУБД Picodata на Rust.</text:span></text:p>
            <text:p text:style-name="P16"><text:span text:style-name="T7">Доступ к взаимодействию пока только через HTTP-запросы, в будущем планируется встроить в планировщик SQL СУБД.</text:span></text:p>
            <text:p text:style-name="P16"><text:span text:style-name="T7"/></text:p>
          </draw:text-box>
        </draw:frame>
        <draw:frame draw:style-name="gr3" draw:text-style-name="P15" draw:layer="layout" svg:width="18.415cm" svg:height="10.75cm" svg:x="7.62cm" svg:y="3.855cm">
          <draw:image xlink:href="Pictures/1001D4FD00004C7B00002CA6795DCC2F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3">
          <draw:frame draw:name="Google Shape;104;p4:notes 4" presentation:style-name="pr2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07;p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style-name="gr3" draw:text-style-name="P15" draw:layer="layout" svg:width="14.98cm" svg:height="10.995cm" svg:x="18.04cm" svg:y="5.08cm">
          <draw:image xlink:href="Pictures/1001BEE000003E8700002DE4B80978D1.pdf" xlink:type="simple" xlink:show="embed" xlink:actuate="onLoad" draw:mime-type="application/pdf" loext:page-number="0">
            <text:p/>
          </draw:image>
          <draw:image xlink:href="Pictures/100000010000025D000001BC0A3D64AE.png" xlink:type="simple" xlink:show="embed" xlink:actuate="onLoad" draw:mime-type="image/png"/>
        </draw:frame>
        <draw:frame draw:style-name="gr5" draw:text-style-name="P17" draw:layer="layout" svg:width="16.906cm" svg:height="10.795cm" svg:x="0.635cm" svg:y="5.08cm">
          <draw:image xlink:href="Pictures/1001CB7F000044A000002BD2AD1AAC4D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3">
          <draw:frame draw:name="Google Shape;104;p4:notes 5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5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29" draw:text-style-name="P14" draw:layer="layout" svg:width="25.611cm" svg:height="8.264cm" svg:x="2.329cm" svg:y="5.071cm" presentation:class="outline" presentation:user-transformed="true">
          <draw:text-box>
            <text:p text:style-name="P16"><text:span text:style-name="T7">Были проведены эксперименты на кластерах со следующими параметрами:</text:span></text:p>
            <text:p text:style-name="P16"><text:span text:style-name="T7">- наборов реплик: 5, 25, 125,</text:span></text:p>
            <text:p text:style-name="P16"><text:span text:style-name="T7">- кардинальность данных: 100k, 10m, 1b,</text:span></text:p>
            <text:p text:style-name="P16"><text:span text:style-name="T7">- кардинальность вторичных ключей: 1:1, 100:1, 10k:1,</text:span></text:p>
            <text:p text:style-name="P16"><text:span text:style-name="T7">- среднее время задержки между узлами: 10мс.</text:span></text:p>
          </draw:text-box>
        </draw:frame>
        <presentation:notes draw:style-name="dp3">
          <draw:frame draw:name="Google Shape;104;p4:notes 2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2T11"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5.054cm" svg:height="9.032cm" svg:x="17.331cm" svg:y="4.303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3" draw:text-style-name="P15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3" draw:text-style-name="P15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3" draw:text-style-name="P15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3">
          <draw:frame draw:name="Google Shape;104;p4:notes 7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2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2T11">
        <draw:frame draw:style-name="gr3" draw:text-style-name="P15" draw:layer="layout" svg:width="15.266cm" svg:height="9.159cm" svg:x="17.119cm" svg:y="4.4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1.348cm" svg:height="4.734cm" svg:x="19.232cm" svg:y="13.604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3" draw:text-style-name="P15" draw:layer="layout" svg:width="15.675cm" svg:height="8.64cm" svg:x="1.1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3" draw:text-style-name="P15" draw:layer="layout" svg:width="11.083cm" svg:height="4.946cm" svg:x="3.522cm" svg:y="13.87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3">
          <draw:frame draw:name="Google Shape;104;p4:notes 8" presentation:style-name="pr3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2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102;p 15" presentation:style-name="pr33" draw:text-style-name="P14" draw:layer="layout" svg:width="21.8cm" svg:height="12.086cm" svg:x="2.33cm" svg:y="5.071cm" presentation:class="outline" presentation:user-transformed="true">
          <draw:text-box>
            <text:p text:style-name="P16"><text:span text:style-name="T7">Расчет на кластере со следующими параметрами:</text:span></text:p>
            <text:p text:style-name="P16"><text:span text:style-name="T7">- наборов реплик: 1000,</text:span></text:p>
            <text:p text:style-name="P16"><text:span text:style-name="T7">- кардинальность данных: 1b,</text:span></text:p>
            <text:p text:style-name="P16"><text:span text:style-name="T7">- кардинальность вторичных ключей: 10:1,</text:span></text:p>
            <text:p text:style-name="P16"><text:span text:style-name="T7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presentation:notes draw:style-name="dp3">
          <draw:frame draw:name="Google Shape;104;p4:notes 6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2T11"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3" draw:text-style-name="P15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3" draw:text-style-name="P15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3" draw:text-style-name="P15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3" draw:text-style-name="P15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3">
          <draw:frame draw:name="Google Shape;104;p4:notes 9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2" draw:layer="layout" svg:width="15.239cm" svg:height="8.572cm" svg:x="1.905cm" svg:y="3.175cm" draw:page-number="18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draw:frame draw:name="Google Shape;119;p6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езультаты</text:span></text:p>
          </draw:text-box>
        </draw:frame>
        <draw:frame draw:style-name="gr6" draw:text-style-name="P19" draw:layer="layout" svg:width="0.502cm" svg:height="1.187cm" svg:x="16.632cm" svg:y="9.126cm">
          <draw:text-box>
            <text:p/>
          </draw:text-box>
        </draw:frame>
        <draw:frame draw:style-name="gr3" draw:text-style-name="P17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6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Математическая модель довольно точно приближенно вычисляет показатели эффективности на небольших кластерах.</text:span></text:p>
            <text:p text:style-name="P16"><text:span text:style-name="T7">Для проверки работоспособности модели необходимы эксперименты на больших кластерах</text:span></text:p>
          </draw:text-box>
        </draw:frame>
        <presentation:notes draw:style-name="dp2">
          <draw:frame draw:name="Google Shape;116;p6:notes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2T11">
        <draw:frame draw:name="Google Shape;119;p 1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азвитие работы</text:span></text:p>
          </draw:text-box>
        </draw:frame>
        <draw:frame draw:style-name="gr6" draw:text-style-name="P19" draw:layer="layout" svg:width="0.502cm" svg:height="1.187cm" svg:x="16.632cm" svg:y="9.126cm">
          <draw:text-box>
            <text:p/>
          </draw:text-box>
        </draw:frame>
        <draw:frame draw:name="Google Shape;102;p 13" presentation:style-name="pr38" draw:text-style-name="P14" draw:layer="layout" svg:width="14.18cm" svg:height="12.086cm" svg:x="2.33cm" svg:y="5.071cm" presentation:class="outline" presentation:user-transformed="true">
          <draw:text-box>
            <text:p text:style-name="P16"><text:span text:style-name="T7">Для повышения точности модели:</text:span></text:p>
            <text:p text:style-name="P16"><text:span text:style-name="T7">- рассмотреть вероятностную модель B+*-дерева</text:span></text:p>
            <text:p text:style-name="P16"><text:span text:style-name="T7">- рассмотреть случаи с “горячими” ключами</text:span></text:p>
            <text:p text:style-name="P16"><text:span text:style-name="T7">- подробнее изучить что влияет на скорость поиска в индексах</text:span></text:p>
          </draw:text-box>
        </draw:frame>
        <draw:frame draw:style-name="gr3" draw:text-style-name="P15" draw:layer="layout" svg:width="15.653cm" svg:height="7.62cm" svg:x="17.167cm" svg:y="6.35cm">
          <draw:image xlink:href="Pictures/100000010000034600000198A09B8021.png" xlink:type="simple" xlink:show="embed" xlink:actuate="onLoad" draw:mime-type="image/png">
            <text:p/>
          </draw:image>
        </draw:frame>
        <presentation:notes draw:style-name="dp3">
          <draw:frame draw:name="Google Shape;116;p6:notes 1" presentation:style-name="pr3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2" draw:layer="layout" svg:width="15.239cm" svg:height="8.572cm" svg:x="1.905cm" svg:y="3.175cm" draw:page-number="20" presentation:class="page"/>
        </presentation:notes>
      </draw:page>
      <draw:page draw:name="Выводы" draw:style-name="dp1" draw:master-page-name="OBJECT" presentation:presentation-page-layout-name="AL2T11">
        <draw:frame draw:name="Google Shape;126;p7" presentation:style-name="pr40" draw:text-style-name="P21" draw:layer="layout" svg:width="29.209cm" svg:height="12.086cm" svg:x="2.329cm" svg:y="3.482cm" presentation:class="outline" presentation:user-transformed="true">
          <draw:text-box>
            <text:p text:style-name="P20"><text:span text:style-name="T10">Спасибо за внимание</text:span></text:p>
          </draw:text-box>
        </draw:frame>
        <presentation:notes draw:style-name="dp2">
          <draw:frame draw:name="Google Shape;122;p7:notes" presentation:style-name="pr4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18T18:48:29.378963453</dc:date>
    <meta:editing-duration>PT6H47M28S</meta:editing-duration>
    <meta:editing-cycles>43</meta:editing-cycles>
    <meta:generator>LibreOffice/25.8.7.3$Linux_X86_64 LibreOffice_project/580$Build-3</meta:generator>
    <meta:print-date>2026-05-09T20:31:46.360464980</meta:print-date>
    <meta:printed-by>PDF files</meta:printed-by>
    <meta:document-statistic meta:object-count="244"/>
  </office:meta>
</office:document-meta>
</file>