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000000379000001EA0DEAE6BB.png" manifest:media-type="image/png"/>
  <manifest:file-entry manifest:full-path="Pictures/1000000000000379000001EAB7A98B09.png" manifest:media-type="image/png"/>
  <manifest:file-entry manifest:full-path="Pictures/100000010000011D00000093A28A5DBB.png" manifest:media-type="image/png"/>
  <manifest:file-entry manifest:full-path="Pictures/10000001000002E4000001B0EE0BE758.png" manifest:media-type="image/png"/>
  <manifest:file-entry manifest:full-path="Pictures/1000000100000500000005009E8D18F3.png" manifest:media-type="image/png"/>
  <manifest:file-entry manifest:full-path="Pictures/10000000000003620000028AAF43F2CB.jpg" manifest:media-type="image/jpeg"/>
  <manifest:file-entry manifest:full-path="Pictures/100000010000028C000001247F0DA8A3.png" manifest:media-type="image/png"/>
  <manifest:file-entry manifest:full-path="Pictures/1001CB7F000044A000002BD24DAFF2CD.pdf" manifest:media-type="application/pdf"/>
  <manifest:file-entry manifest:full-path="Pictures/10011A8300001B7B00000F2BB7FD08EA.svg" manifest:media-type="image/svg+xml"/>
  <manifest:file-entry manifest:full-path="Pictures/10000000000002580000025828CED5F2.png" manifest:media-type="image/png"/>
  <manifest:file-entry manifest:full-path="Pictures/1000000100000384000001F465B85C8B.png" manifest:media-type="image/png"/>
  <manifest:file-entry manifest:full-path="Pictures/10000001000004B000000436C2E9BAD7.png" manifest:media-type="image/png"/>
  <manifest:file-entry manifest:full-path="Pictures/1000000100000298000001A8F6148938.png" manifest:media-type="image/png"/>
  <manifest:file-entry manifest:full-path="Pictures/1001D4FD00004C7B00002CA699E892AF.pdf" manifest:media-type="application/pdf"/>
  <manifest:file-entry manifest:full-path="Pictures/1001163F00001CEF00000F45F4D91B82.svg" manifest:media-type="image/svg+xml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1F26A000041BC00001E2EBC8AB75D.pdf" manifest:media-type="application/pdf"/>
  <manifest:file-entry manifest:full-path="Pictures/1000000100000323000000E6AC7E3D99.png" manifest:media-type="image/png"/>
  <manifest:file-entry manifest:full-path="Pictures/100000010000031C000000920F1559BB.png" manifest:media-type="image/png"/>
  <manifest:file-entry manifest:full-path="Pictures/100000010000019F0000012CBECBB9C8.png" manifest:media-type="image/png"/>
  <manifest:file-entry manifest:full-path="Pictures/100000010000010A00000093A57EAFE9.png" manifest:media-type="image/png"/>
  <manifest:file-entry manifest:full-path="Pictures/1001DF010000436300001E2EC131D73B.pdf" manifest:media-type="application/pdf"/>
  <manifest:file-entry manifest:full-path="Pictures/100000010000019D000000BB5FE70595.png" manifest:media-type="image/png"/>
  <manifest:file-entry manifest:full-path="Pictures/1000000100000384000001F4E4920962.png" manifest:media-type="image/png"/>
  <manifest:file-entry manifest:full-path="Pictures/1000000000000379000001EA6DF73825.png" manifest:media-type="image/png"/>
  <manifest:file-entry manifest:full-path="Pictures/10010F9200001C1600000F2B46666F73.svg" manifest:media-type="image/svg+xml"/>
  <manifest:file-entry manifest:full-path="Pictures/1000000100000118000000942374779D.png" manifest:media-type="image/png"/>
  <manifest:file-entry manifest:full-path="Pictures/100000010000011000000093787A1228.png" manifest:media-type="image/png"/>
  <manifest:file-entry manifest:full-path="Pictures/10013F3000002AE400001F027AE3C416.pdf" manifest:media-type="application/pdf"/>
  <manifest:file-entry manifest:full-path="Pictures/100000010000027C000001248290F1FA.png" manifest:media-type="image/png"/>
  <manifest:file-entry manifest:full-path="Pictures/10000001000004380000025822F26057.png" manifest:media-type="image/png"/>
  <manifest:file-entry manifest:full-path="Pictures/100000010000043800000258385D62A5.png" manifest:media-type="image/png"/>
  <manifest:file-entry manifest:full-path="Pictures/100110D000001D6F00000F2BCF4084F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0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26pt" style:font-size-asian="6pt" style:font-size-complex="6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999999" loext:opacity="100%" style:font-name="CaskaydiaMono NF SemiLight1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style:font-name="CaskaydiaMono NF SemiLight1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1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  <style:text-properties style:font-name="CaskaydiaMono NF SemiLigh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9" style:family="paragraph">
      <loext:graphic-properties draw:fill="none"/>
      <style:paragraph-properties fo:margin-top="0.42cm" fo:margin-bottom="0.35cm"/>
      <style:text-properties style:font-name="CaskaydiaMono NF SemiLight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26pt" fo:letter-spacing="normal" fo:language="ru" fo:country="RU" fo:font-style="normal" fo:text-shadow="none" style:text-underline-style="none" fo:font-weight="normal" style:letter-kerning="true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26pt" fo:letter-spacing="normal" fo:language="ru" fo:country="RU" fo:font-style="normal" style:text-underline-style="none" fo:font-weight="normal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language="ru" fo:country="RU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language="ru" fo:country="RU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color="#999999" loext:opacity="100%" style:font-name="CaskaydiaMono NF SemiLight1" fo:font-size="18pt" style:font-size-asian="18pt" style:font-size-complex="18pt"/>
    </style:style>
    <style:style style:name="T6" style:family="text">
      <style:text-properties fo:color="#999999" loext:opacity="100%" style:font-name="CaskaydiaMono NF SemiLight1" fo:font-size="15pt" style:font-size-asian="15pt" style:font-size-complex="15pt"/>
    </style:style>
    <style:style style:name="T7" style:family="text">
      <style:text-properties style:font-name="CaskaydiaMono NF SemiLight1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style:font-name="CaskaydiaMono NF SemiLight1" fo:font-size="20pt" style:font-size-asian="20pt" style:font-size-complex="20pt"/>
    </style:style>
    <style:style style:name="T11" style:family="text">
      <style:text-properties style:font-name="CaskaydiaMono NF SemiLight1" fo:font-size="18pt" style:font-size-asian="18pt" style:font-size-complex="18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office:forms form:automatic-focus="false" form:apply-design-mode="false"/>
        <draw:frame draw:name="Google Shape;95;p2" presentation:style-name="pr1" draw:text-style-name="P2" draw:layer="layout" svg:width="25.399cm" svg:height="6.35cm" svg:x="4.234cm" svg:y="6.65cm" presentation:class="title" presentation:user-transformed="true">
          <draw:text-box>
            <text:p text:style-name="P1"><text:span text:style-name="T1">«Реализация глобального вторичного индекса и сравнительный анализ его производительности с локальными индексами в распределенной СУБД Picodata</text:span><text:span text:style-name="T2">»</text:span></text:p>
          </draw:text-box>
        </draw:frame>
        <draw:frame draw:name="Google Shape;96;p2" presentation:style-name="pr2" draw:text-style-name="P4" draw:layer="layout" svg:width="15.875cm" svg:height="3.175cm" svg:x="0.635cm" svg:y="15.24cm" presentation:class="subtitle" presentation:user-transformed="true">
          <draw:text-box>
            <text:p text:style-name="P3"><text:span text:style-name="T3">Выполнил:</text:span></text:p>
            <text:p text:style-name="P3"><text:span text:style-name="T3">студент группы </text:span><text:span text:style-name="T4">М8О-403Б-22, Клименко В.М.</text:span></text:p>
            <text:p text:style-name="P3"><text:span text:style-name="T4"/></text:p>
            <text:p text:style-name="P3"><text:span text:style-name="T3">Научный руководитель:</text:span></text:p>
            <text:p text:style-name="P3"><text:span text:style-name="T3">канд. техн. наук, доц. Романенков А.М.</text:span></text:p>
            <text:p text:style-name="P3"><text:span text:style-name="T4"/></text:p>
            <text:p text:style-name="P3"><text:span text:style-name="T4"/></text:p>
          </draw:text-box>
        </draw:frame>
        <draw:frame draw:style-name="gr1" draw:text-style-name="P6" draw:layer="layout" svg:width="25.4cm" svg:height="3.427cm" svg:x="4.445cm" svg:y="0.635cm">
          <draw:text-box>
            <text:p text:style-name="P5"><text:span text:style-name="T5">Московский авиационный институт</text:span></text:p>
            <text:p text:style-name="P5"><text:span text:style-name="T5">(национальный исследовательский университет)</text:span></text:p>
            <text:p text:style-name="P5"><text:span text:style-name="T6">Институт №8 “Компьютерные науки и прикладная математика”</text:span></text:p>
            <text:p text:style-name="P5"><text:span text:style-name="T6">Образовательный центр Института №8</text:span></text:p>
          </draw:text-box>
        </draw:frame>
        <draw:frame draw:style-name="gr2" draw:text-style-name="P7" draw:layer="layout" svg:width="18.415cm" svg:height="1.979cm" svg:x="7.726cm" svg:y="4.445cm">
          <draw:text-box>
            <text:p text:style-name="P5"><text:span text:style-name="T7">ВЫПУСКНАЯ КВАЛИФИКАЦИОННАЯ РАБОТА БАКАЛАВРА</text:span></text:p>
            <text:p text:style-name="P5"><text:span text:style-name="T7">на тему:</text:span></text:p>
          </draw:text-box>
        </draw:frame>
        <presentation:notes draw:style-name="dp2">
          <draw:page-thumbnail draw:name="Google Shape;91;p2:notes" draw:style-name="gr3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Предметная область</text:span></text:p>
          </draw:text-box>
        </draw:frame>
        <draw:frame draw:name="Google Shape;102;p 1" presentation:style-name="pr6" draw:text-style-name="P14" draw:layer="layout" svg:width="20.532cm" svg:height="12.086cm" svg:x="2.328cm" svg:y="5.071cm" presentation:class="outline" presentation:user-transformed="true">
          <draw:text-box>
            <text:p text:style-name="P13"><text:span text:style-name="T10">Объект работы: индексирование данных в распределенных СУБД</text:span></text:p>
            <text:p text:style-name="P13"><text:span text:style-name="T10">Предмет работы: глобальный вторичный индекс в распределенной СУБД Picodata</text:span></text:p>
          </draw:text-box>
        </draw:frame>
        <presentation:notes draw:style-name="dp4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3" draw:layer="layout" svg:width="15.239cm" svg:height="8.572cm" svg:x="1.905cm" svg:y="3.175cm" draw:page-number="2" presentation:class="page"/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Проблема</text:span></text:p>
          </draw:text-box>
        </draw:frame>
        <draw:frame draw:name="Google Shape;102;p 14" presentation:style-name="pr8" draw:text-style-name="P14" draw:layer="layout" svg:width="21.802cm" svg:height="12.086cm" svg:x="2.328cm" svg:y="5.071cm" presentation:class="outline" presentation:user-transformed="true">
          <draw:text-box>
            <text:p text:style-name="P13"><text:span text:style-name="T10">Неэффективный поиск по вторичным ключам высокой кардинальности ввиду стратегии сегментирования индекса в кластере СУБД Picodata.</text:span></text:p>
            <text:p text:style-name="P13"><text:span text:style-name="T10">Каждый запрос опрашивает весь кластер, что приводит к блокировке исполнения заявок других клиентов на время поиска.</text:span></text:p>
          </draw:text-box>
        </draw:frame>
        <presentation:notes draw:style-name="dp4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3" draw:layer="layout" svg:width="15.239cm" svg:height="8.572cm" svg:x="1.905cm" svg:y="3.175cm" draw:page-number="3" presentation:class="page"/>
        </presentation:notes>
      </draw:page>
      <draw:page draw:name="page4" draw:style-name="dp3" draw:master-page-name="OBJECT" presentation:presentation-page-layout-name="AL2T11">
        <office:forms form:automatic-focus="false" form:apply-design-mode="false"/>
        <draw:frame draw:name="Google Shape;101;p 8" presentation:style-name="pr5" draw:text-style-name="P12" draw:layer="layout" svg:width="31.115cm" svg:height="3.681cm" svg:x="1.27cm" svg:y="1.07cm" presentation:class="title" presentation:user-transformed="true">
          <draw:text-box>
            <text:p text:style-name="P11"><text:span text:style-name="T9">Локальный вторичный индекс (ЛВИ)</text:span></text:p>
          </draw:text-box>
        </draw:frame>
        <draw:frame draw:style-name="gr4" draw:text-style-name="P15" draw:layer="layout" svg:width="26.278cm" svg:height="12.065cm" svg:x="3.794cm" svg:y="5.38cm">
          <draw:image xlink:href="Pictures/1001F26A000041BC00001E2EBC8AB75D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presentation:notes draw:style-name="dp4">
          <draw:frame draw:name="Google Shape;98;p3:notes 8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8" draw:style-name="gr3" draw:layer="layout" svg:width="15.239cm" svg:height="8.572cm" svg:x="1.905cm" svg:y="3.175cm" draw:page-number="4" presentation:class="page"/>
        </presentation:notes>
      </draw:page>
      <draw:page draw:name="page5" draw:style-name="dp3" draw:master-page-name="OBJECT" presentation:presentation-page-layout-name="AL2T11">
        <office:forms form:automatic-focus="false" form:apply-design-mode="false"/>
        <draw:frame draw:name="Google Shape;101;p 10" presentation:style-name="pr5" draw:text-style-name="P12" draw:layer="layout" svg:width="31.115cm" svg:height="3.681cm" svg:x="1.27cm" svg:y="1.07cm" presentation:class="title" presentation:user-transformed="true">
          <draw:text-box>
            <text:p text:style-name="P11"><text:span text:style-name="T9">Локальный вторичный индекс (ЛВИ)</text:span></text:p>
          </draw:text-box>
        </draw:frame>
        <draw:frame draw:style-name="gr4" draw:text-style-name="P15" draw:layer="layout" svg:width="19.05cm" svg:height="13.772cm" svg:x="6.985cm" svg:y="4.344cm">
          <draw:image xlink:href="Pictures/10013F3000002AE400001F027AE3C416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4">
          <draw:frame draw:name="Google Shape;98;p3:notes 10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0" draw:style-name="gr3" draw:layer="layout" svg:width="15.239cm" svg:height="8.572cm" svg:x="1.905cm" svg:y="3.175cm" draw:page-number="5" presentation:class="page"/>
        </presentation:notes>
      </draw:page>
      <draw:page draw:name="page6" draw:style-name="dp3" draw:master-page-name="OBJECT" presentation:presentation-page-layout-name="AL2T11">
        <office:forms form:automatic-focus="false" form:apply-design-mode="false"/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Актуальность</text:span></text:p>
          </draw:text-box>
        </draw:frame>
        <draw:frame draw:name="Google Shape;102;p 2" presentation:style-name="pr12" draw:text-style-name="P14" draw:layer="layout" svg:width="21.802cm" svg:height="12.086cm" svg:x="2.328cm" svg:y="5.071cm" presentation:class="outline" presentation:user-transformed="true">
          <draw:text-box>
            <text:p text:style-name="P16"><text:span text:style-name="T11">Горизонтальное масштабирование – необходимость в случае крупных цифровых продуктов.</text:span></text:p>
            <text:p text:style-name="P16"><text:span text:style-name="T11">Вторичные индексы – важнейший инструмент по обеспечению быстрого поиска в СУБД.</text:span></text:p>
            <text:p text:style-name="P16"><text:span text:style-name="T12">При поиске в ЛВИ, количество сетевых запросов растет линейно количеству узлов в кластере.</text:span></text:p>
          </draw:text-box>
        </draw:frame>
        <presentation:notes draw:style-name="dp4">
          <draw:frame draw:name="Google Shape;98;p3:notes 2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3" draw:layer="layout" svg:width="15.239cm" svg:height="8.572cm" svg:x="1.905cm" svg:y="3.175cm" draw:page-number="6" presentation:class="page"/>
        </presentation:notes>
      </draw:page>
      <draw:page draw:name="page7" draw:style-name="dp3" draw:master-page-name="OBJECT" presentation:presentation-page-layout-name="AL2T11">
        <office:forms form:automatic-focus="false" form:apply-design-mode="false"/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Решение</text:span></text:p>
          </draw:text-box>
        </draw:frame>
        <draw:frame draw:name="Google Shape;102;p 3" presentation:style-name="pr14" draw:text-style-name="P14" draw:layer="layout" svg:width="21.802cm" svg:height="6.359cm" svg:x="2.328cm" svg:y="5.071cm" presentation:class="outline" presentation:user-transformed="true">
          <draw:text-box>
            <text:p text:style-name="P16"><text:span text:style-name="T11">Глобальный вторичный индекс позволяет добиться максимальной эффективности поиска по вторичным ключам высокой кардинальности. В иных случаях он практически не уступает ЛВИ.</text:span></text:p>
            <text:p text:style-name="P16"><text:span text:style-name="T11">Недостаток: обновление записи происходит с двумя дополнительными сетевыми запросами.</text:span></text:p>
          </draw:text-box>
        </draw:frame>
        <presentation:notes draw:style-name="dp4">
          <draw:frame draw:name="Google Shape;98;p3:notes 3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3" draw:layer="layout" svg:width="15.239cm" svg:height="8.572cm" svg:x="1.905cm" svg:y="3.175cm" draw:page-number="7" presentation:class="page"/>
        </presentation:notes>
      </draw:page>
      <draw:page draw:name="page8" draw:style-name="dp3" draw:master-page-name="OBJECT" presentation:presentation-page-layout-name="AL2T11">
        <office:forms form:automatic-focus="false" form:apply-design-mode="false"/>
        <draw:frame draw:name="Google Shape;101;p 11" presentation:style-name="pr5" draw:text-style-name="P12" draw:layer="layout" svg:width="31.75cm" svg:height="3.681cm" svg:x="1.27cm" svg:y="1.07cm" presentation:class="title" presentation:user-transformed="true">
          <draw:text-box>
            <text:p text:style-name="P11"><text:span text:style-name="T9">Глобальный вторичный индекс (ГВИ)</text:span></text:p>
          </draw:text-box>
        </draw:frame>
        <draw:frame draw:style-name="gr4" draw:text-style-name="P15" draw:layer="layout" svg:width="26.941cm" svg:height="12.065cm" svg:x="3.463cm" svg:y="5.415cm">
          <draw:image xlink:href="Pictures/1001DF010000436300001E2EC131D73B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4">
          <draw:frame draw:name="Google Shape;98;p3:notes 11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1" draw:style-name="gr3" draw:layer="layout" svg:width="15.239cm" svg:height="8.572cm" svg:x="1.905cm" svg:y="3.175cm" draw:page-number="8" presentation:class="page"/>
        </presentation:notes>
      </draw:page>
      <draw:page draw:name="page9" draw:style-name="dp3" draw:master-page-name="OBJECT" presentation:presentation-page-layout-name="AL2T11">
        <office:forms form:automatic-focus="false" form:apply-design-mode="false"/>
        <draw:frame draw:name="Google Shape;101;p 9" presentation:style-name="pr5" draw:text-style-name="P12" draw:layer="layout" svg:width="31.75cm" svg:height="3.681cm" svg:x="1.27cm" svg:y="1.07cm" presentation:class="title" presentation:user-transformed="true">
          <draw:text-box>
            <text:p text:style-name="P11"><text:span text:style-name="T9">Глобальный вторичный индекс (ГВИ)</text:span></text:p>
          </draw:text-box>
        </draw:frame>
        <draw:frame draw:style-name="gr5" draw:text-style-name="P17" draw:layer="layout" svg:width="22.792cm" svg:height="14.554cm" svg:x="5.537cm" svg:y="3.861cm">
          <draw:image xlink:href="Pictures/1001CB7F000044A000002BD24DAFF2CD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4">
          <draw:frame draw:name="Google Shape;98;p3:notes 9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9" draw:style-name="gr3" draw:layer="layout" svg:width="15.239cm" svg:height="8.572cm" svg:x="1.905cm" svg:y="3.175cm" draw:page-number="9" presentation:class="page"/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Цель</text:span></text:p>
          </draw:text-box>
        </draw:frame>
        <draw:frame draw:name="Google Shape;102;p 4" presentation:style-name="pr18" draw:text-style-name="P14" draw:layer="layout" svg:width="17.357cm" svg:height="12.086cm" svg:x="2.328cm" svg:y="5.071cm" presentation:class="outline" presentation:user-transformed="true">
          <draw:text-box>
            <text:p text:style-name="P16"><text:span text:style-name="T11">Дать заказчикам возможность выбора индексной структуры, подходящей под их нужды.</text:span></text:p>
            <text:p text:style-name="P16"><text:span text:style-name="T11">Выбор зависит от множества параметров:</text:span></text:p>
            <text:p text:style-name="P16"><text:span text:style-name="T11">- размер кластера,</text:span></text:p>
            <text:p text:style-name="P16"><text:span text:style-name="T11">- нагрузка на кластер, ее вид,</text:span></text:p>
            <text:p text:style-name="P16"><text:span text:style-name="T11">- скорость сети между узлами,</text:span></text:p>
            <text:p text:style-name="P16"><text:span text:style-name="T11">- ...</text:span></text:p>
            <text:p text:style-name="P16"><text:span text:style-name="T11">Необходимо создать способ расчета эффективности индексов по этим параметрам. </text:span></text:p>
          </draw:text-box>
        </draw:frame>
        <presentation:notes draw:style-name="dp4">
          <draw:frame draw:name="Google Shape;98;p3:notes 4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3" draw:layer="layout" svg:width="15.239cm" svg:height="8.572cm" svg:x="1.905cm" svg:y="3.175cm" draw:page-number="10" presentation:class="page"/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Задачи</text:span></text:p>
          </draw:text-box>
        </draw:frame>
        <draw:frame draw:name="Google Shape;102;p 5" presentation:style-name="pr20" draw:text-style-name="P14" draw:layer="layout" svg:width="18.627cm" svg:height="12.086cm" svg:x="2.328cm" svg:y="5.071cm" presentation:class="outline" presentation:user-transformed="true">
          <draw:text-box>
            <text:p text:style-name="P16"><text:span text:style-name="T11">1. Составить математическую модель обеих индексных структур.</text:span></text:p>
            <text:p text:style-name="P16"><text:span text:style-name="T11">2. Разработать плагин ГВИ для СУБД Picodata.</text:span></text:p>
            <text:p text:style-name="P16"><text:span text:style-name="T11">3. Проверить точность математической модели с помощью натурных экспериментов малого масштаба.</text:span></text:p>
            <text:p text:style-name="P16"><text:span text:style-name="T11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4">
          <draw:frame draw:name="Google Shape;98;p3:notes 5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3" draw:layer="layout" svg:width="15.239cm" svg:height="8.572cm" svg:x="1.905cm" svg:y="3.175cm" draw:page-number="11" presentation:class="page"/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style-name="gr4" draw:text-style-name="P15" draw:layer="layout" svg:width="5.08cm" svg:height="5.08cm" svg:x="19.05cm" svg:y="10.16cm">
          <draw:image xlink:href="Pictures/10000000000002580000025828CED5F2.png" xlink:type="simple" xlink:show="embed" xlink:actuate="onLoad" draw:mime-type="image/png">
            <text:p/>
          </draw:image>
        </draw:frame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9">Сравнение с аналогами</text:span></text:p>
          </draw:text-box>
        </draw:frame>
        <draw:frame draw:name="Google Shape;102;p 6" presentation:style-name="pr22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11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11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4" draw:text-style-name="P15" draw:layer="layout" svg:width="8.46cm" svg:height="6.35cm" svg:x="18.615cm" svg:y="3.81cm">
          <draw:image xlink:href="Pictures/10000000000003620000028AAF43F2CB.jpg" xlink:type="simple" xlink:show="embed" xlink:actuate="onLoad" draw:mime-type="image/jpeg">
            <text:p/>
          </draw:image>
        </draw:frame>
        <draw:frame draw:style-name="gr4" draw:text-style-name="P15" draw:layer="layout" svg:width="4.732cm" svg:height="4.732cm" svg:x="26.035cm" svg:y="7.033cm">
          <draw:image xlink:href="Pictures/1000000100000500000005009E8D18F3.png" xlink:type="simple" xlink:show="embed" xlink:actuate="onLoad" draw:mime-type="image/png">
            <text:p/>
          </draw:image>
        </draw:frame>
        <draw:frame draw:style-name="gr4" draw:text-style-name="P15" draw:layer="layout" svg:width="4.98cm" svg:height="4.474cm" svg:x="24.23cm" svg:y="12.671cm">
          <draw:image xlink:href="Pictures/10000001000004B000000436C2E9BAD7.png" xlink:type="simple" xlink:show="embed" xlink:actuate="onLoad" draw:mime-type="image/png">
            <text:p/>
          </draw:image>
        </draw:frame>
        <presentation:notes draw:style-name="dp4">
          <draw:frame draw:name="Google Shape;98;p3:notes 6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3" draw:layer="layout" svg:width="15.239cm" svg:height="8.572cm" svg:x="1.905cm" svg:y="3.175cm" draw:page-number="12" presentation:class="page"/>
        </presentation:notes>
      </draw:page>
      <draw:page draw:name="Дизайн исследования" draw:style-name="dp3" draw:master-page-name="OBJECT" presentation:presentation-page-layout-name="AL2T11">
        <office:forms form:automatic-focus="false" form:apply-design-mode="false"/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Математическая модель</text:span></text:p>
          </draw:text-box>
        </draw:frame>
        <draw:frame draw:name="Google Shape;102;p 7" presentation:style-name="pr24" draw:text-style-name="P14" draw:layer="layout" svg:width="20.531cm" svg:height="12.086cm" svg:x="2.329cm" svg:y="5.071cm" presentation:class="outline" presentation:user-transformed="true">
          <draw:text-box>
            <text:p text:style-name="P16"><text:span text:style-name="T11">СУБД моделируется как N СМО M/G/1, где N - количество наборов реплик в кластере.</text:span></text:p>
            <text:p text:style-name="P16"><text:span text:style-name="T11">В модели учитывается время работы узла и передача результатов по сети.</text:span></text:p>
            <text:p text:style-name="P16"><text:span text:style-name="T11">Предполагается равномерное распределение данных в кластере.</text:span></text:p>
            <text:p text:style-name="P16"><text:span text:style-name="T11"/></text:p>
          </draw:text-box>
        </draw:frame>
        <presentation:notes draw:style-name="dp2">
          <draw:frame draw:name="Google Shape;104;p4:notes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3" draw:layer="layout" svg:width="15.239cm" svg:height="8.572cm" svg:x="1.905cm" svg:y="3.175cm" draw:page-number="13" presentation:class="page"/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107;p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Математическая модель</text:span></text:p>
          </draw:text-box>
        </draw:frame>
        <draw:frame draw:style-name="gr4" draw:text-style-name="P15" draw:layer="layout" svg:width="15.231cm" svg:height="2.224cm" svg:x="1.279cm" svg:y="4.54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4" draw:text-style-name="P15" draw:layer="layout" svg:width="16.602cm" svg:height="4.754cm" svg:x="0.557cm" svg:y="9.66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4" draw:text-style-name="P15" draw:layer="layout" svg:width="15.185cm" svg:height="4.148cm" svg:x="17cm" svg:y="6.21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4" draw:text-style-name="P15" draw:layer="layout" svg:width="13.371cm" svg:height="2.451cm" svg:x="17.501cm" svg:y="14.635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4">
          <draw:frame draw:name="Google Shape;104;p4:notes 10" presentation:style-name="pr2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0" draw:style-name="gr3" draw:layer="layout" svg:width="15.239cm" svg:height="8.572cm" svg:x="1.905cm" svg:y="3.175cm" draw:page-number="14" presentation:class="page"/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Параметры модели</text:span></text:p>
          </draw:text-box>
        </draw:frame>
        <draw:frame draw:name="Google Shape;102;p 11" presentation:style-name="pr27" draw:text-style-name="P14" draw:layer="layout" svg:width="19.261cm" svg:height="12.086cm" svg:x="2.329cm" svg:y="5.071cm" presentation:class="outline" presentation:user-transformed="true">
          <draw:text-box>
            <text:p text:style-name="P16"><text:span text:style-name="T11">Пользователям модели предлагается самим рассчитать </text:span><text:span text:style-name="T11">показатели, актуальные для их сервиса и кластера </text:span><text:span text:style-name="T11">СУБД.</text:span></text:p>
            <text:p text:style-name="P16"><text:span text:style-name="T11">Предоставлены ориентировочные значения каждого </text:span><text:span text:style-name="T11">параметра для удобства моделирования.</text:span></text:p>
          </draw:text-box>
        </draw:frame>
        <presentation:notes draw:style-name="dp4">
          <draw:frame draw:name="Google Shape;104;p4:notes 3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3" draw:layer="layout" svg:width="15.239cm" svg:height="8.572cm" svg:x="1.905cm" svg:y="3.175cm" draw:page-number="15" presentation:class="page"/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Показатели эффективности</text:span></text:p>
          </draw:text-box>
        </draw:frame>
        <draw:frame draw:name="Google Shape;102;p 8" presentation:style-name="pr29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11">В качестве результата, модель возвращает значения четырех показателей эффективности:</text:span></text:p>
            <text:p text:style-name="P16"><text:span text:style-name="T11">- максимальная нагрузка на кластер</text:span></text:p>
            <text:p text:style-name="P16"><text:span text:style-name="T11">- вероятность необслуживания запроса ввиду таймаута</text:span></text:p>
            <text:p text:style-name="P16"><text:span text:style-name="T12">- среднее время ожидания </text:span><text:span text:style-name="T11">пользователем ответа от СУБД</text:span></text:p>
            <text:p text:style-name="P16"><text:span text:style-name="T11">- среднее время нахождения заявки в очереди</text:span></text:p>
          </draw:text-box>
        </draw:frame>
        <draw:frame draw:style-name="gr4" draw:text-style-name="P15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4" draw:text-style-name="P15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4">
          <draw:frame draw:name="Google Shape;104;p4:notes 1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3" draw:layer="layout" svg:width="15.239cm" svg:height="8.572cm" svg:x="1.905cm" svg:y="3.175cm" draw:page-number="16" presentation:class="page"/>
        </presentation:notes>
      </draw:page>
      <draw:page draw:name="page17" draw:style-name="dp3" draw:master-page-name="OBJECT" presentation:presentation-page-layout-name="AL2T11">
        <office:forms form:automatic-focus="false" form:apply-design-mode="false"/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Реализация ГВИ</text:span></text:p>
          </draw:text-box>
        </draw:frame>
        <draw:frame draw:style-name="gr4" draw:text-style-name="P15" draw:layer="layout" svg:width="23.931cm" svg:height="13.97cm" svg:x="4.809cm" svg:y="4.01cm">
          <draw:image xlink:href="Pictures/1001D4FD00004C7B00002CA699E892AF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4">
          <draw:frame draw:name="Google Shape;104;p4:notes 4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3" draw:layer="layout" svg:width="15.239cm" svg:height="8.572cm" svg:x="1.905cm" svg:y="3.175cm" draw:page-number="17" presentation:class="page"/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Сравнение модели с реальностью</text:span></text:p>
          </draw:text-box>
        </draw:frame>
        <draw:frame draw:name="Google Shape;102;p 9" presentation:style-name="pr32" draw:text-style-name="P14" draw:layer="layout" svg:width="25.611cm" svg:height="8.264cm" svg:x="2.329cm" svg:y="5.071cm" presentation:class="outline" presentation:user-transformed="true">
          <draw:text-box>
            <text:p text:style-name="P16"><text:span text:style-name="T11">Были проведены эксперименты на кластерах со следующими параметрами:</text:span></text:p>
            <text:p text:style-name="P16"><text:span text:style-name="T11">- наборов реплик: 1, 4, 8,</text:span></text:p>
            <text:p text:style-name="P16"><text:span text:style-name="T11">- кардинальность данных: 10k, 100k,</text:span></text:p>
            <text:p text:style-name="P16"><text:span text:style-name="T11">- кардинальность вторичных ключей: 1:1, 1:10, 1:1000,</text:span></text:p>
            <text:p text:style-name="P16"><text:span text:style-name="T11">- среднее время задержки между узлами: 1мс.</text:span></text:p>
          </draw:text-box>
        </draw:frame>
        <presentation:notes draw:style-name="dp4">
          <draw:frame draw:name="Google Shape;104;p4:notes 2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3" draw:layer="layout" svg:width="15.239cm" svg:height="8.572cm" svg:x="1.905cm" svg:y="3.175cm" draw:page-number="18" presentation:class="page"/>
        </presentation:notes>
      </draw:page>
      <draw:page draw:name="page19" draw:style-name="dp3" draw:master-page-name="OBJECT" presentation:presentation-page-layout-name="AL2T11">
        <office:forms form:automatic-focus="false" form:apply-design-mode="false"/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Сравнение модели с реальностью</text:span></text:p>
          </draw:text-box>
        </draw:frame>
        <draw:frame draw:style-name="gr6" draw:text-style-name="P5" draw:layer="layout" svg:width="15.054cm" svg:height="9.032cm" svg:x="17.197cm" svg:y="4.437cm">
          <draw:image xlink:href="Pictures/10000001000004380000025822F26057.png" xlink:type="simple" xlink:show="embed" xlink:actuate="onLoad" draw:mime-type="image/png">
            <text:p/>
          </draw:image>
        </draw:frame>
        <draw:frame draw:style-name="gr6" draw:text-style-name="P5" draw:layer="layout" svg:width="15.9cm" svg:height="8.764cm" svg:x="0.635cm" svg:y="4.795cm">
          <draw:image xlink:href="Pictures/1000000100000384000001F4E4920962.png" xlink:type="simple" xlink:show="embed" xlink:actuate="onLoad" draw:mime-type="image/png">
            <text:p/>
          </draw:image>
        </draw:frame>
        <draw:frame draw:style-name="gr6" draw:text-style-name="P5" draw:layer="layout" svg:width="10.794cm" svg:height="4.708cm" svg:x="3.175cm" svg:y="13.97cm">
          <draw:image xlink:href="Pictures/10010F9200001C1600000F2B46666F73.svg" xlink:type="simple" xlink:show="embed" xlink:actuate="onLoad" draw:mime-type="image/svg+xml">
            <text:p/>
          </draw:image>
          <draw:image xlink:href="Pictures/100000010000011000000093787A1228.png" xlink:type="simple" xlink:show="embed" xlink:actuate="onLoad" draw:mime-type="image/png"/>
        </draw:frame>
        <draw:frame draw:style-name="gr6" draw:text-style-name="P5" draw:layer="layout" svg:width="10.632cm" svg:height="5.366cm" svg:x="19.685cm" svg:y="13.335cm">
          <draw:image xlink:href="Pictures/10011A8300001B7B00000F2BB7FD08EA.svg" xlink:type="simple" xlink:show="embed" xlink:actuate="onLoad" draw:mime-type="image/svg+xml">
            <text:p/>
          </draw:image>
          <draw:image xlink:href="Pictures/100000010000010A00000093A57EAFE9.png" xlink:type="simple" xlink:show="embed" xlink:actuate="onLoad" draw:mime-type="image/png"/>
        </draw:frame>
        <presentation:notes draw:style-name="dp4">
          <draw:frame draw:name="Google Shape;104;p4:notes 7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3" draw:layer="layout" svg:width="15.239cm" svg:height="8.572cm" svg:x="1.905cm" svg:y="3.175cm" draw:page-number="19" presentation:class="page"/>
        </presentation:notes>
      </draw:page>
      <draw:page draw:name="page20" draw:style-name="dp3" draw:master-page-name="OBJECT" presentation:presentation-page-layout-name="AL2T11">
        <office:forms form:automatic-focus="false" form:apply-design-mode="false"/>
        <draw:frame draw:style-name="gr6" draw:text-style-name="P5" draw:layer="layout" svg:width="15.675cm" svg:height="8.709cm" svg:x="17.045cm" svg:y="4.771cm">
          <draw:image xlink:href="Pictures/100000010000043800000258385D62A5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Сравнение модели с реальностью</text:span></text:p>
          </draw:text-box>
        </draw:frame>
        <draw:frame draw:style-name="gr6" draw:text-style-name="P5" draw:layer="layout" svg:width="15.84cm" svg:height="8.8cm" svg:x="0.567cm" svg:y="4.78cm">
          <draw:image xlink:href="Pictures/1000000100000384000001F465B85C8B.png" xlink:type="simple" xlink:show="embed" xlink:actuate="onLoad" draw:mime-type="image/png">
            <text:p/>
          </draw:image>
        </draw:frame>
        <draw:frame draw:style-name="gr6" draw:text-style-name="P5" draw:layer="layout" svg:width="10.381cm" svg:height="4.633cm" svg:x="3.273cm" svg:y="13.885cm">
          <draw:image xlink:href="Pictures/100110D000001D6F00000F2BCF4084F3.svg" xlink:type="simple" xlink:show="embed" xlink:actuate="onLoad" draw:mime-type="image/svg+xml">
            <text:p/>
          </draw:image>
          <draw:image xlink:href="Pictures/100000010000011D00000093A28A5DBB.png" xlink:type="simple" xlink:show="embed" xlink:actuate="onLoad" draw:mime-type="image/png"/>
        </draw:frame>
        <draw:frame draw:style-name="gr6" draw:text-style-name="P5" draw:layer="layout" svg:width="10.613cm" svg:height="4.427cm" svg:x="19.615cm" svg:y="13.777cm">
          <draw:image xlink:href="Pictures/1001163F00001CEF00000F45F4D91B82.svg" xlink:type="simple" xlink:show="embed" xlink:actuate="onLoad" draw:mime-type="image/svg+xml">
            <text:p/>
          </draw:image>
          <draw:image xlink:href="Pictures/1000000100000118000000942374779D.png" xlink:type="simple" xlink:show="embed" xlink:actuate="onLoad" draw:mime-type="image/png"/>
        </draw:frame>
        <presentation:notes draw:style-name="dp4">
          <draw:frame draw:name="Google Shape;104;p4:notes 8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3" draw:layer="layout" svg:width="15.239cm" svg:height="8.572cm" svg:x="1.905cm" svg:y="3.175cm" draw:page-number="20" presentation:class="page"/>
        </presentation:notes>
      </draw:page>
      <draw:page draw:name="page21" draw:style-name="dp3" draw:master-page-name="OBJECT" presentation:presentation-page-layout-name="AL2T11">
        <office:forms form:automatic-focus="false" form:apply-design-mode="false"/>
        <draw:frame draw:name="Google Shape;102;p 15" presentation:style-name="pr36" draw:text-style-name="P14" draw:layer="layout" svg:width="21.8cm" svg:height="12.086cm" svg:x="2.33cm" svg:y="5.071cm" presentation:class="outline" presentation:user-transformed="true">
          <draw:text-box>
            <text:p text:style-name="P16"><text:span text:style-name="T11">Расчет на кластере со следующими параметрами:</text:span></text:p>
            <text:p text:style-name="P16"><text:span text:style-name="T11">- наборов реплик: 1000,</text:span></text:p>
            <text:p text:style-name="P16"><text:span text:style-name="T11">- кардинальность данных: 1b,</text:span></text:p>
            <text:p text:style-name="P16"><text:span text:style-name="T11">- кардинальность вторичных ключей: 10:1,</text:span></text:p>
            <text:p text:style-name="P16"><text:span text:style-name="T11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Модель большого кластера</text:span></text:p>
          </draw:text-box>
        </draw:frame>
        <presentation:notes draw:style-name="dp4">
          <draw:frame draw:name="Google Shape;104;p4:notes 6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3" draw:layer="layout" svg:width="15.239cm" svg:height="8.572cm" svg:x="1.905cm" svg:y="3.175cm" draw:page-number="21" presentation:class="page"/>
        </presentation:notes>
      </draw:page>
      <draw:page draw:name="page22" draw:style-name="dp3" draw:master-page-name="OBJECT" presentation:presentation-page-layout-name="AL2T11">
        <office:forms form:automatic-focus="false" form:apply-design-mode="false"/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9">Модель большого кластера</text:span></text:p>
          </draw:text-box>
        </draw:frame>
        <draw:frame draw:style-name="gr4" draw:text-style-name="P15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4" draw:text-style-name="P15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4" draw:text-style-name="P15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4" draw:text-style-name="P15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4">
          <draw:frame draw:name="Google Shape;104;p4:notes 9" presentation:style-name="pr3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3" draw:layer="layout" svg:width="15.239cm" svg:height="8.572cm" svg:x="1.905cm" svg:y="3.175cm" draw:page-number="22" presentation:class="page"/>
        </presentation:notes>
      </draw:page>
      <draw:page draw:name="Результаты 2 (при необходимости)" draw:style-name="dp3" draw:master-page-name="OBJECT" presentation:presentation-page-layout-name="AL2T11">
        <office:forms form:automatic-focus="false" form:apply-design-mode="false"/>
        <draw:frame draw:name="Google Shape;119;p6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13">Результаты</text:span></text:p>
          </draw:text-box>
        </draw:frame>
        <draw:frame draw:style-name="gr7" draw:text-style-name="P19" draw:layer="layout" svg:width="0.502cm" svg:height="1.187cm" svg:x="16.632cm" svg:y="9.126cm">
          <draw:text-box>
            <text:p/>
          </draw:text-box>
        </draw:frame>
        <draw:frame draw:style-name="gr4" draw:text-style-name="P17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9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11">Математическая модель довольно точно вычисляет показатели эффективности на небольших кластерах.</text:span></text:p>
            <text:p text:style-name="P16"><text:span text:style-name="T11">Разработан плагин, реализующий глобальные вторичные индексы, для СУБД Picodata.</text:span></text:p>
          </draw:text-box>
        </draw:frame>
        <presentation:notes draw:style-name="dp2">
          <draw:frame draw:name="Google Shape;116;p6:notes" presentation:style-name="pr4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3" draw:layer="layout" svg:width="15.239cm" svg:height="8.572cm" svg:x="1.905cm" svg:y="3.175cm" draw:page-number="23" presentation:class="page"/>
        </presentation:notes>
      </draw:page>
      <draw:page draw:name="page24" draw:style-name="dp3" draw:master-page-name="OBJECT" presentation:presentation-page-layout-name="AL2T11">
        <office:forms form:automatic-focus="false" form:apply-design-mode="false"/>
        <draw:frame draw:name="Google Shape;119;p 1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13">Развитие работы</text:span></text:p>
          </draw:text-box>
        </draw:frame>
        <draw:frame draw:style-name="gr7" draw:text-style-name="P19" draw:layer="layout" svg:width="0.502cm" svg:height="1.187cm" svg:x="16.632cm" svg:y="9.126cm">
          <draw:text-box>
            <text:p/>
          </draw:text-box>
        </draw:frame>
        <draw:frame draw:name="Google Shape;102;p 13" presentation:style-name="pr41" draw:text-style-name="P14" draw:layer="layout" svg:width="17.355cm" svg:height="12.086cm" svg:x="2.33cm" svg:y="5.071cm" presentation:class="outline" presentation:user-transformed="true">
          <draw:text-box>
            <text:p text:style-name="P16"><text:span text:style-name="T11">Для повышения точности модели:</text:span></text:p>
            <text:p text:style-name="P16"><text:span text:style-name="T11">- рассмотреть вероятностную модель B+*-дерева</text:span></text:p>
            <text:p text:style-name="P16"><text:span text:style-name="T11">- рассмотреть случаи с “горячими” ключами</text:span></text:p>
            <text:p text:style-name="P16"><text:span text:style-name="T11">- подробнее изучить что влияет на скорость поиска</text:span></text:p>
          </draw:text-box>
        </draw:frame>
        <presentation:notes draw:style-name="dp4">
          <draw:frame draw:name="Google Shape;116;p6:notes 1" presentation:style-name="pr4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3" draw:layer="layout" svg:width="15.239cm" svg:height="8.572cm" svg:x="1.905cm" svg:y="3.175cm" draw:page-number="24" presentation:class="page"/>
        </presentation:notes>
      </draw:page>
      <draw:page draw:name="Выводы" draw:style-name="dp3" draw:master-page-name="OBJECT" presentation:presentation-page-layout-name="AL2T11">
        <office:forms form:automatic-focus="false" form:apply-design-mode="false"/>
        <draw:frame draw:name="Google Shape;126;p7" presentation:style-name="pr43" draw:text-style-name="P21" draw:layer="layout" svg:width="29.209cm" svg:height="12.086cm" svg:x="2.329cm" svg:y="3.482cm" presentation:class="outline" presentation:user-transformed="true">
          <draw:text-box>
            <text:p text:style-name="P20"><text:span text:style-name="T14">Спасибо за внимание</text:span></text:p>
          </draw:text-box>
        </draw:frame>
        <presentation:notes draw:style-name="dp2">
          <draw:frame draw:name="Google Shape;122;p7:notes" presentation:style-name="pr4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3" draw:layer="layout" svg:width="15.239cm" svg:height="8.572cm" svg:x="1.905cm" svg:y="3.17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6-05T18:20:06.905764313</dc:date>
    <meta:editing-duration>PT9H10M56S</meta:editing-duration>
    <meta:editing-cycles>63</meta:editing-cycles>
    <meta:generator>LibreOffice/25.8.7.3$Linux_X86_64 LibreOffice_project/fa62c01a44f84ad74d4904d2c894664e98fd27c1</meta:generator>
    <meta:print-date>2026-06-05T18:20:14.374290156</meta:print-date>
    <meta:printed-by>PDF files</meta:printed-by>
    <meta:document-statistic meta:object-count="257"/>
  </office:meta>
</office:document-meta>
</file>